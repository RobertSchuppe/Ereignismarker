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53cm"/>
    </style:style>
    <style:style style:name="co2" style:family="table-column">
      <style:table-column-properties fo:break-before="auto" style:column-width="2.258cm"/>
    </style:style>
    <style:style style:name="co3" style:family="table-column">
      <style:table-column-properties fo:break-before="auto" style:column-width="7.696cm"/>
    </style:style>
    <style:style style:name="co4" style:family="table-column">
      <style:table-column-properties fo:break-before="auto" style:column-width="3.464cm"/>
    </style:style>
    <style:style style:name="co5" style:family="table-column">
      <style:table-column-properties fo:break-before="auto" style:column-width="3.403cm"/>
    </style:style>
    <style:style style:name="co6" style:family="table-column">
      <style:table-column-properties fo:break-before="auto" style:column-width="6.556cm"/>
    </style:style>
    <style:style style:name="co7" style:family="table-column">
      <style:table-column-properties fo:break-before="auto" style:column-width="5.248cm"/>
    </style:style>
    <style:style style:name="co8" style:family="table-column">
      <style:table-column-properties fo:break-before="auto" style:column-width="5.24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data-style-name="N114"/>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table-cell table:style-name="ce2" office:value-type="string" calcext:value-type="string">
            <text:p>plötzlich</text:p>
          </table:table-cell>
          <table:table-cell table:number-columns-repeated="4"/>
        </table:table-row>
        <table:table-row table:style-name="ro1">
          <table:table-cell office:value-type="string" calcext:value-type="string">
            <text:p>Art und Weise</text:p>
          </table:table-cell>
          <table:table-cell office:value-type="float" office:value="10" calcext:value-type="float">
            <text:p>10</text:p>
          </table:table-cell>
          <table:table-cell/>
          <table:table-cell office:value-type="string" calcext:value-type="string">
            <text:p>Verändertes, Endzustand, Art und Weise</text:p>
          </table:table-cell>
          <table:table-cell office:value-type="float" office:value="5" calcext:value-type="float">
            <text:p>5</text:p>
          </table:table-cell>
        </table:table-row>
        <table:table-row table:style-name="ro1">
          <table:table-cell office:value-type="string" calcext:value-type="string">
            <text:p>Verändertes</text:p>
          </table:table-cell>
          <table:table-cell office:value-type="float" office:value="7" calcext:value-type="float">
            <text:p>7</text:p>
          </table:table-cell>
          <table:table-cell/>
          <table:table-cell office:value-type="string" calcext:value-type="string">
            <text:p>Ursache, Ort, Art und Weise</text:p>
          </table:table-cell>
          <table:table-cell office:value-type="float" office:value="1" calcext:value-type="float">
            <text:p>1</text:p>
          </table:table-cell>
        </table:table-row>
        <table:table-row table:style-name="ro1">
          <table:table-cell office:value-type="string" calcext:value-type="string">
            <text:p>Verändertes [INI]</text:p>
          </table:table-cell>
          <table:table-cell office:value-type="float" office:value="3" calcext:value-type="float">
            <text:p>3</text:p>
          </table:table-cell>
          <table:table-cell/>
          <table:table-cell office:value-type="string" calcext:value-type="string">
            <text:p>Verändertes, Ort, Art und Weise</text:p>
          </table:table-cell>
          <table:table-cell office:value-type="float" office:value="1" calcext:value-type="float">
            <text:p>1</text:p>
          </table:table-cell>
        </table:table-row>
        <table:table-row table:style-name="ro1">
          <table:table-cell office:value-type="string" calcext:value-type="string">
            <text:p>Endzustand</text:p>
          </table:table-cell>
          <table:table-cell office:value-type="float" office:value="7" calcext:value-type="float">
            <text:p>7</text:p>
          </table:table-cell>
          <table:table-cell/>
          <table:table-cell office:value-type="string" calcext:value-type="string">
            <text:p>Verändertes, Zeit, Endzustand, Art und Weise</text:p>
          </table:table-cell>
          <table:table-cell office:value-type="float" office:value="1" calcext:value-type="float">
            <text:p>1</text:p>
          </table:table-cell>
        </table:table-row>
        <table:table-row table:style-name="ro1">
          <table:table-cell office:value-type="string" calcext:value-type="string">
            <text:p>Endzustand [INI]</text:p>
          </table:table-cell>
          <table:table-cell office:value-type="float" office:value="1" calcext:value-type="float">
            <text:p>1</text:p>
          </table:table-cell>
          <table:table-cell/>
          <table:table-cell office:value-type="string" calcext:value-type="string">
            <text:p>Endzustand, Ort, Art und Weise</text:p>
          </table:table-cell>
          <table:table-cell office:value-type="float" office:value="1" calcext:value-type="float">
            <text:p>1</text:p>
          </table:table-cell>
        </table:table-row>
        <table:table-row table:style-name="ro1">
          <table:table-cell office:value-type="string" calcext:value-type="string">
            <text:p>Anfangszustand</text:p>
          </table:table-cell>
          <table:table-cell office:value-type="float" office:value="1" calcext:value-type="float">
            <text:p>1</text:p>
          </table:table-cell>
          <table:table-cell/>
          <table:table-cell office:value-type="string" calcext:value-type="string">
            <text:p>Anfangszustand, Art und Weise</text:p>
          </table:table-cell>
          <table:table-cell office:value-type="float" office:value="1" calcext:value-type="float">
            <text:p>1</text:p>
          </table:table-cell>
        </table:table-row>
        <table:table-row table:style-name="ro1">
          <table:table-cell office:value-type="string" calcext:value-type="string">
            <text:p>Anfangszustand [INI]</text:p>
          </table:table-cell>
          <table:table-cell office:value-type="float" office:value="1" calcext:value-type="float">
            <text:p>1</text:p>
          </table:table-cell>
          <table:table-cell table:number-columns-repeated="3"/>
        </table:table-row>
        <table:table-row table:style-name="ro1">
          <table:table-cell office:value-type="string" calcext:value-type="string">
            <text:p>Ursache</text:p>
          </table:table-cell>
          <table:table-cell office:value-type="float" office:value="1" calcext:value-type="float">
            <text:p>1</text:p>
          </table:table-cell>
          <table:table-cell table:number-columns-repeated="3"/>
        </table:table-row>
        <table:table-row table:style-name="ro1">
          <table:table-cell office:value-type="string" calcext:value-type="string">
            <text:p>Ort</text:p>
          </table:table-cell>
          <table:table-cell office:value-type="float" office:value="3" calcext:value-type="float">
            <text:p>3</text:p>
          </table:table-cell>
          <table:table-cell table:number-columns-repeated="3"/>
        </table:table-row>
        <table:table-row table:style-name="ro1">
          <table:table-cell office:value-type="string" calcext:value-type="string">
            <text:p>Zeit</text:p>
          </table:table-cell>
          <table:table-cell office:value-type="float" office:value="1" calcext:value-type="float">
            <text:p>1</text:p>
          </table:table-cell>
          <table:table-cell table:number-columns-repeated="3"/>
        </table:table-row>
        <table:table-row table:style-name="ro1">
          <table:table-cell table:number-columns-repeated="5"/>
        </table:table-row>
        <table:table-row table:style-name="ro1">
          <table:table-cell table:style-name="ce2" office:value-type="string" calcext:value-type="string">
            <text:p>da</text:p>
          </table:table-cell>
          <table:table-cell table:number-columns-repeated="4"/>
        </table:table-row>
        <table:table-row table:style-name="ro1">
          <table:table-cell office:value-type="string" calcext:value-type="string">
            <text:p>Art und Weise</text:p>
          </table:table-cell>
          <table:table-cell office:value-type="float" office:value="10" calcext:value-type="float">
            <text:p>10</text:p>
          </table:table-cell>
          <table:table-cell/>
          <table:table-cell office:value-type="string" calcext:value-type="string">
            <text:p>Verändertes, Endzustand, Art und Weise</text:p>
          </table:table-cell>
          <table:table-cell office:value-type="float" office:value="2" calcext:value-type="float">
            <text:p>2</text:p>
          </table:table-cell>
        </table:table-row>
        <table:table-row table:style-name="ro1">
          <table:table-cell office:value-type="string" calcext:value-type="string">
            <text:p>Verändertes</text:p>
          </table:table-cell>
          <table:table-cell office:value-type="float" office:value="8" calcext:value-type="float">
            <text:p>8</text:p>
          </table:table-cell>
          <table:table-cell/>
          <table:table-cell office:value-type="string" calcext:value-type="string">
            <text:p>Attribut, Art und Weise</text:p>
          </table:table-cell>
          <table:table-cell office:value-type="float" office:value="1" calcext:value-type="float">
            <text:p>1</text:p>
          </table:table-cell>
        </table:table-row>
        <table:table-row table:style-name="ro1">
          <table:table-cell office:value-type="string" calcext:value-type="string">
            <text:p>Verändertes [INI]</text:p>
          </table:table-cell>
          <table:table-cell office:value-type="float" office:value="2" calcext:value-type="float">
            <text:p>2</text:p>
          </table:table-cell>
          <table:table-cell/>
          <table:table-cell office:value-type="string" calcext:value-type="string">
            <text:p>Verändertes, Endzustand, Iterationen, Art und Weise</text:p>
          </table:table-cell>
          <table:table-cell office:value-type="float" office:value="1" calcext:value-type="float">
            <text:p>1</text:p>
          </table:table-cell>
        </table:table-row>
        <table:table-row table:style-name="ro1">
          <table:table-cell office:value-type="string" calcext:value-type="string">
            <text:p>Anfangszustand</text:p>
          </table:table-cell>
          <table:table-cell office:value-type="float" office:value="4" calcext:value-type="float">
            <text:p>4</text:p>
          </table:table-cell>
          <table:table-cell/>
          <table:table-cell office:value-type="string" calcext:value-type="string">
            <text:p>Verändertes, Anfangszustand, Art und Weise</text:p>
          </table:table-cell>
          <table:table-cell office:value-type="float" office:value="3" calcext:value-type="float">
            <text:p>3</text:p>
          </table:table-cell>
        </table:table-row>
        <table:table-row table:style-name="ro1">
          <table:table-cell office:value-type="string" calcext:value-type="string">
            <text:p>Anfangszustand [INI]</text:p>
          </table:table-cell>
          <table:table-cell office:value-type="float" office:value="1" calcext:value-type="float">
            <text:p>1</text:p>
          </table:table-cell>
          <table:table-cell/>
          <table:table-cell office:value-type="string" calcext:value-type="string">
            <text:p>Verändertes, Zwischenwert, Art und Weise</text:p>
          </table:table-cell>
          <table:table-cell office:value-type="float" office:value="1" calcext:value-type="float">
            <text:p>1</text:p>
          </table:table-cell>
        </table:table-row>
        <table:table-row table:style-name="ro1">
          <table:table-cell office:value-type="string" calcext:value-type="string">
            <text:p>Endzustand</text:p>
          </table:table-cell>
          <table:table-cell office:value-type="float" office:value="4" calcext:value-type="float">
            <text:p>4</text:p>
          </table:table-cell>
          <table:table-cell/>
          <table:table-cell office:value-type="string" calcext:value-type="string">
            <text:p>Verändertes, Endzustand, Grad, Art und Weise</text:p>
          </table:table-cell>
          <table:table-cell office:value-type="float" office:value="1" calcext:value-type="float">
            <text:p>1</text:p>
          </table:table-cell>
        </table:table-row>
        <table:table-row table:style-name="ro1">
          <table:table-cell office:value-type="string" calcext:value-type="string">
            <text:p>Endzustand [INI]</text:p>
          </table:table-cell>
          <table:table-cell office:value-type="float" office:value="2" calcext:value-type="float">
            <text:p>2</text:p>
          </table:table-cell>
          <table:table-cell/>
          <table:table-cell office:value-type="string" calcext:value-type="string">
            <text:p>Anfangszustand, Art und Weise</text:p>
          </table:table-cell>
          <table:table-cell office:value-type="float" office:value="1" calcext:value-type="float">
            <text:p>1</text:p>
          </table:table-cell>
        </table:table-row>
        <table:table-row table:style-name="ro1">
          <table:table-cell office:value-type="string" calcext:value-type="string">
            <text:p>Iterationen</text:p>
          </table:table-cell>
          <table:table-cell office:value-type="float" office:value="1" calcext:value-type="float">
            <text:p>1</text:p>
          </table:table-cell>
          <table:table-cell table:number-columns-repeated="3"/>
        </table:table-row>
        <table:table-row table:style-name="ro1">
          <table:table-cell office:value-type="string" calcext:value-type="string">
            <text:p>Zwischenwert</text:p>
          </table:table-cell>
          <table:table-cell office:value-type="float" office:value="1" calcext:value-type="float">
            <text:p>1</text:p>
          </table:table-cell>
          <table:table-cell table:number-columns-repeated="3"/>
        </table:table-row>
        <table:table-row table:style-name="ro1">
          <table:table-cell office:value-type="string" calcext:value-type="string">
            <text:p>Grad</text:p>
          </table:table-cell>
          <table:table-cell office:value-type="float" office:value="1" calcext:value-type="float">
            <text:p>1</text:p>
          </table:table-cell>
          <table:table-cell table:number-columns-repeated="3"/>
        </table:table-row>
        <table:table-row table:style-name="ro1">
          <table:table-cell office:value-type="string" calcext:value-type="string">
            <text:p>Attribut</text:p>
          </table:table-cell>
          <table:table-cell office:value-type="float" office:value="1" calcext:value-type="float">
            <text:p>1</text:p>
          </table:table-cell>
          <table:table-cell table:number-columns-repeated="3"/>
        </table:table-row>
        <table:table-row table:style-name="ro1">
          <table:table-cell table:number-columns-repeated="5"/>
        </table:table-row>
        <table:table-row table:style-name="ro1">
          <table:table-cell table:style-name="ce2" office:value-type="string" calcext:value-type="string">
            <text:p>auf einmal</text:p>
          </table:table-cell>
          <table:table-cell table:number-columns-repeated="4"/>
        </table:table-row>
        <table:table-row table:style-name="ro1">
          <table:table-cell office:value-type="string" calcext:value-type="string">
            <text:p>Art und Weise</text:p>
          </table:table-cell>
          <table:table-cell office:value-type="float" office:value="10" calcext:value-type="float">
            <text:p>10</text:p>
          </table:table-cell>
          <table:table-cell/>
          <table:table-cell office:value-type="string" calcext:value-type="string">
            <text:p>Verändertes, Endzustand, Art und Weise</text:p>
          </table:table-cell>
          <table:table-cell office:value-type="float" office:value="3" calcext:value-type="float">
            <text:p>3</text:p>
          </table:table-cell>
        </table:table-row>
        <table:table-row table:style-name="ro1">
          <table:table-cell office:value-type="string" calcext:value-type="string">
            <text:p>Verändertes</text:p>
          </table:table-cell>
          <table:table-cell office:value-type="float" office:value="8" calcext:value-type="float">
            <text:p>8</text:p>
          </table:table-cell>
          <table:table-cell/>
          <table:table-cell office:value-type="string" calcext:value-type="string">
            <text:p>Verändertes, Endzustand, Grad, Art und Weise</text:p>
          </table:table-cell>
          <table:table-cell office:value-type="float" office:value="2" calcext:value-type="float">
            <text:p>2</text:p>
          </table:table-cell>
        </table:table-row>
        <table:table-row table:style-name="ro1">
          <table:table-cell office:value-type="string" calcext:value-type="string">
            <text:p>Verändertes [INI]</text:p>
          </table:table-cell>
          <table:table-cell office:value-type="float" office:value="2" calcext:value-type="float">
            <text:p>2</text:p>
          </table:table-cell>
          <table:table-cell/>
          <table:table-cell office:value-type="string" calcext:value-type="string">
            <text:p>Endzustand, Ort, Art und Weise</text:p>
          </table:table-cell>
          <table:table-cell office:value-type="float" office:value="1" calcext:value-type="float">
            <text:p>1</text:p>
          </table:table-cell>
        </table:table-row>
        <table:table-row table:style-name="ro1">
          <table:table-cell office:value-type="string" calcext:value-type="string">
            <text:p>Endzustand</text:p>
          </table:table-cell>
          <table:table-cell office:value-type="float" office:value="8" calcext:value-type="float">
            <text:p>8</text:p>
          </table:table-cell>
          <table:table-cell/>
          <table:table-cell office:value-type="string" calcext:value-type="string">
            <text:p>Verändertes, Art und Weise</text:p>
          </table:table-cell>
          <table:table-cell office:value-type="float" office:value="1" calcext:value-type="float">
            <text:p>1</text:p>
          </table:table-cell>
        </table:table-row>
        <table:table-row table:style-name="ro1">
          <table:table-cell office:value-type="string" calcext:value-type="string">
            <text:p>Endzustand [INI]</text:p>
          </table:table-cell>
          <table:table-cell office:value-type="float" office:value="2" calcext:value-type="float">
            <text:p>2</text:p>
          </table:table-cell>
          <table:table-cell/>
          <table:table-cell office:value-type="string" calcext:value-type="string">
            <text:p>Verändertes, Iterationen, Grad, Endzustand, Art und Weise</text:p>
          </table:table-cell>
          <table:table-cell office:value-type="float" office:value="1" calcext:value-type="float">
            <text:p>1</text:p>
          </table:table-cell>
        </table:table-row>
        <table:table-row table:style-name="ro1">
          <table:table-cell office:value-type="string" calcext:value-type="string">
            <text:p>Grad</text:p>
          </table:table-cell>
          <table:table-cell office:value-type="float" office:value="4" calcext:value-type="float">
            <text:p>4</text:p>
          </table:table-cell>
          <table:table-cell/>
          <table:table-cell office:value-type="string" calcext:value-type="string">
            <text:p>Verändertes, Endzustand, Ort, Art und Weise</text:p>
          </table:table-cell>
          <table:table-cell office:value-type="float" office:value="1" calcext:value-type="float">
            <text:p>1</text:p>
          </table:table-cell>
        </table:table-row>
        <table:table-row table:style-name="ro1">
          <table:table-cell office:value-type="string" calcext:value-type="string">
            <text:p>Ort</text:p>
          </table:table-cell>
          <table:table-cell office:value-type="float" office:value="3" calcext:value-type="float">
            <text:p>3</text:p>
          </table:table-cell>
          <table:table-cell/>
          <table:table-cell office:value-type="string" calcext:value-type="string">
            <text:p>Grad, Ort, Art und Weise</text:p>
          </table:table-cell>
          <table:table-cell office:value-type="float" office:value="1" calcext:value-type="float">
            <text:p>1</text:p>
          </table:table-cell>
        </table:table-row>
        <table:table-row table:style-name="ro1">
          <table:table-cell office:value-type="string" calcext:value-type="string">
            <text:p>Iterationen</text:p>
          </table:table-cell>
          <table:table-cell office:value-type="float" office:value="1" calcext:value-type="float">
            <text:p>1</text:p>
          </table:table-cell>
          <table:table-cell table:number-columns-repeated="3"/>
        </table:table-row>
        <table:table-row table:style-name="ro1">
          <table:table-cell table:number-columns-repeated="5"/>
        </table:table-row>
        <table:table-row table:style-name="ro1">
          <table:table-cell table:style-name="ce2" office:value-type="string" calcext:value-type="string">
            <text:p>in dem Moment</text:p>
          </table:table-cell>
          <table:table-cell table:number-columns-repeated="4"/>
        </table:table-row>
        <table:table-row table:style-name="ro1">
          <table:table-cell office:value-type="string" calcext:value-type="string">
            <text:p>Art und Weise</text:p>
          </table:table-cell>
          <table:table-cell office:value-type="float" office:value="7" calcext:value-type="float">
            <text:p>7</text:p>
          </table:table-cell>
          <table:table-cell/>
          <table:table-cell office:value-type="string" calcext:value-type="string">
            <text:p>Verändertes, Art und Weise</text:p>
          </table:table-cell>
          <table:table-cell office:value-type="float" office:value="2" calcext:value-type="float">
            <text:p>2</text:p>
          </table:table-cell>
        </table:table-row>
        <table:table-row table:style-name="ro1">
          <table:table-cell office:value-type="string" calcext:value-type="string">
            <text:p>Verändertes</text:p>
          </table:table-cell>
          <table:table-cell office:value-type="float" office:value="5" calcext:value-type="float">
            <text:p>5</text:p>
          </table:table-cell>
          <table:table-cell/>
          <table:table-cell office:value-type="string" calcext:value-type="string">
            <text:p>Verändertes, Endzustand, Art und Weise</text:p>
          </table:table-cell>
          <table:table-cell office:value-type="float" office:value="4" calcext:value-type="float">
            <text:p>4</text:p>
          </table:table-cell>
        </table:table-row>
        <table:table-row table:style-name="ro1">
          <table:table-cell office:value-type="string" calcext:value-type="string">
            <text:p>Verändertes [INI]</text:p>
          </table:table-cell>
          <table:table-cell office:value-type="float" office:value="2" calcext:value-type="float">
            <text:p>2</text:p>
          </table:table-cell>
          <table:table-cell/>
          <table:table-cell office:value-type="string" calcext:value-type="string">
            <text:p>Endzustand, Ort, Art und Weise</text:p>
          </table:table-cell>
          <table:table-cell office:value-type="float" office:value="1" calcext:value-type="float">
            <text:p>1</text:p>
          </table:table-cell>
        </table:table-row>
        <table:table-row table:style-name="ro1">
          <table:table-cell office:value-type="string" calcext:value-type="string">
            <text:p>Endzustand</text:p>
          </table:table-cell>
          <table:table-cell office:value-type="float" office:value="5" calcext:value-type="float">
            <text:p>5</text:p>
          </table:table-cell>
          <table:table-cell table:number-columns-repeated="3"/>
        </table:table-row>
        <table:table-row table:style-name="ro1">
          <table:table-cell office:value-type="string" calcext:value-type="string">
            <text:p>Endzustand [INI]</text:p>
          </table:table-cell>
          <table:table-cell office:value-type="float" office:value="2" calcext:value-type="float">
            <text:p>2</text:p>
          </table:table-cell>
          <table:table-cell table:number-columns-repeated="3"/>
        </table:table-row>
        <table:table-row table:style-name="ro1">
          <table:table-cell office:value-type="string" calcext:value-type="string">
            <text:p>Ort</text:p>
          </table:table-cell>
          <table:table-cell office:value-type="float" office:value="1" calcext:value-type="float">
            <text:p>1</text:p>
          </table:table-cell>
          <table:table-cell table:number-columns-repeated="3"/>
        </table:table-row>
        <table:table-row table:style-name="ro1">
          <table:table-cell table:number-columns-repeated="5"/>
        </table:table-row>
        <table:table-row table:style-name="ro1">
          <table:table-cell table:style-name="ce2" office:value-type="string" calcext:value-type="string">
            <text:p>in diesem Moment</text:p>
          </table:table-cell>
          <table:table-cell table:number-columns-repeated="4"/>
        </table:table-row>
        <table:table-row table:style-name="ro1">
          <table:table-cell office:value-type="string" calcext:value-type="string">
            <text:p>Art und Weise</text:p>
          </table:table-cell>
          <table:table-cell office:value-type="float" office:value="10" calcext:value-type="float">
            <text:p>10</text:p>
          </table:table-cell>
          <table:table-cell/>
          <table:table-cell office:value-type="string" calcext:value-type="string">
            <text:p>Verändertes, Endzustand, Art und Weise</text:p>
          </table:table-cell>
          <table:table-cell office:value-type="float" office:value="3" calcext:value-type="float">
            <text:p>3</text:p>
          </table:table-cell>
        </table:table-row>
        <table:table-row table:style-name="ro1">
          <table:table-cell office:value-type="string" calcext:value-type="string">
            <text:p>Verändertes</text:p>
          </table:table-cell>
          <table:table-cell office:value-type="float" office:value="9" calcext:value-type="float">
            <text:p>9</text:p>
          </table:table-cell>
          <table:table-cell/>
          <table:table-cell office:value-type="string" calcext:value-type="string">
            <text:p>Verändertes, Attribut, Grad, Art und Weise</text:p>
          </table:table-cell>
          <table:table-cell office:value-type="float" office:value="2" calcext:value-type="float">
            <text:p>2</text:p>
          </table:table-cell>
        </table:table-row>
        <table:table-row table:style-name="ro1">
          <table:table-cell office:value-type="string" calcext:value-type="string">
            <text:p>Verändertes [INI]</text:p>
          </table:table-cell>
          <table:table-cell office:value-type="float" office:value="1" calcext:value-type="float">
            <text:p>1</text:p>
          </table:table-cell>
          <table:table-cell/>
          <table:table-cell office:value-type="string" calcext:value-type="string">
            <text:p>Anfangszustand, Grad, Art und Weise</text:p>
          </table:table-cell>
          <table:table-cell office:value-type="float" office:value="1" calcext:value-type="float">
            <text:p>1</text:p>
          </table:table-cell>
        </table:table-row>
        <table:table-row table:style-name="ro1">
          <table:table-cell office:value-type="string" calcext:value-type="string">
            <text:p>Endzustand</text:p>
          </table:table-cell>
          <table:table-cell office:value-type="float" office:value="6" calcext:value-type="float">
            <text:p>6</text:p>
          </table:table-cell>
          <table:table-cell/>
          <table:table-cell office:value-type="string" calcext:value-type="string">
            <text:p>Verändertes, Endzustand, Iterationen, Art und Weise</text:p>
          </table:table-cell>
          <table:table-cell office:value-type="float" office:value="2" calcext:value-type="float">
            <text:p>2</text:p>
          </table:table-cell>
        </table:table-row>
        <table:table-row table:style-name="ro1">
          <table:table-cell office:value-type="string" calcext:value-type="string">
            <text:p>Endzustand [INI]</text:p>
          </table:table-cell>
          <table:table-cell office:value-type="float" office:value="2" calcext:value-type="float">
            <text:p>2</text:p>
          </table:table-cell>
          <table:table-cell/>
          <table:table-cell office:value-type="string" calcext:value-type="string">
            <text:p>Verändertes, Anfangszustand, Art und Weise</text:p>
          </table:table-cell>
          <table:table-cell office:value-type="float" office:value="1" calcext:value-type="float">
            <text:p>1</text:p>
          </table:table-cell>
        </table:table-row>
        <table:table-row table:style-name="ro1">
          <table:table-cell office:value-type="string" calcext:value-type="string">
            <text:p>Attribut</text:p>
          </table:table-cell>
          <table:table-cell office:value-type="float" office:value="1" calcext:value-type="float">
            <text:p>1</text:p>
          </table:table-cell>
          <table:table-cell/>
          <table:table-cell office:value-type="string" calcext:value-type="string">
            <text:p>Verändertes, Endzustand, Gewissheit, Art und Weise</text:p>
          </table:table-cell>
          <table:table-cell office:value-type="float" office:value="1" calcext:value-type="float">
            <text:p>1</text:p>
          </table:table-cell>
        </table:table-row>
        <table:table-row table:style-name="ro1">
          <table:table-cell office:value-type="string" calcext:value-type="string">
            <text:p>Grad</text:p>
          </table:table-cell>
          <table:table-cell office:value-type="float" office:value="3" calcext:value-type="float">
            <text:p>3</text:p>
          </table:table-cell>
          <table:table-cell table:number-columns-repeated="3"/>
        </table:table-row>
        <table:table-row table:style-name="ro1">
          <table:table-cell office:value-type="string" calcext:value-type="string">
            <text:p>Anfangszustand</text:p>
          </table:table-cell>
          <table:table-cell office:value-type="float" office:value="2" calcext:value-type="float">
            <text:p>2</text:p>
          </table:table-cell>
          <table:table-cell table:number-columns-repeated="3"/>
        </table:table-row>
        <table:table-row table:style-name="ro1">
          <table:table-cell office:value-type="string" calcext:value-type="string">
            <text:p>Anfangszustand [INI]</text:p>
          </table:table-cell>
          <table:table-cell office:value-type="float" office:value="1" calcext:value-type="float">
            <text:p>1</text:p>
          </table:table-cell>
          <table:table-cell table:number-columns-repeated="3"/>
        </table:table-row>
        <table:table-row table:style-name="ro1">
          <table:table-cell office:value-type="string" calcext:value-type="string">
            <text:p>Iterationen</text:p>
          </table:table-cell>
          <table:table-cell office:value-type="float" office:value="2" calcext:value-type="float">
            <text:p>2</text:p>
          </table:table-cell>
          <table:table-cell table:number-columns-repeated="3"/>
        </table:table-row>
        <table:table-row table:style-name="ro1">
          <table:table-cell office:value-type="string" calcext:value-type="string">
            <text:p>Gewissheit</text:p>
          </table:table-cell>
          <table:table-cell office:value-type="float" office:value="1" calcext:value-type="float">
            <text:p>1</text:p>
          </table:table-cell>
          <table:table-cell table:number-columns-repeated="3"/>
        </table:table-row>
        <table:table-row table:style-name="ro1">
          <table:table-cell table:number-columns-repeated="5"/>
        </table:table-row>
        <table:table-row table:style-name="ro1">
          <table:table-cell table:style-name="ce2" office:value-type="string" calcext:value-type="string">
            <text:p>in dem Augenblick</text:p>
          </table:table-cell>
          <table:table-cell table:number-columns-repeated="4"/>
        </table:table-row>
        <table:table-row table:style-name="ro1">
          <table:table-cell office:value-type="string" calcext:value-type="string">
            <text:p>Art und Weise</text:p>
          </table:table-cell>
          <table:table-cell office:value-type="float" office:value="6" calcext:value-type="float">
            <text:p>6</text:p>
          </table:table-cell>
          <table:table-cell/>
          <table:table-cell office:value-type="string" calcext:value-type="string">
            <text:p>Verändertes, Endzustand, Iterationen, Grad, Art und Weise</text:p>
          </table:table-cell>
          <table:table-cell office:value-type="float" office:value="1" calcext:value-type="float">
            <text:p>1</text:p>
          </table:table-cell>
        </table:table-row>
        <table:table-row table:style-name="ro1">
          <table:table-cell office:value-type="string" calcext:value-type="string">
            <text:p>Verändertes</text:p>
          </table:table-cell>
          <table:table-cell office:value-type="float" office:value="6" calcext:value-type="float">
            <text:p>6</text:p>
          </table:table-cell>
          <table:table-cell/>
          <table:table-cell office:value-type="string" calcext:value-type="string">
            <text:p>Verändertes, Art und Weise</text:p>
          </table:table-cell>
          <table:table-cell office:value-type="float" office:value="4" calcext:value-type="float">
            <text:p>4</text:p>
          </table:table-cell>
        </table:table-row>
        <table:table-row table:style-name="ro1">
          <table:table-cell office:value-type="string" calcext:value-type="string">
            <text:p>Endzustand</text:p>
          </table:table-cell>
          <table:table-cell office:value-type="float" office:value="2" calcext:value-type="float">
            <text:p>2</text:p>
          </table:table-cell>
          <table:table-cell/>
          <table:table-cell office:value-type="string" calcext:value-type="string">
            <text:p>Verändertes, Endzustand, Art und Weise</text:p>
          </table:table-cell>
          <table:table-cell office:value-type="float" office:value="1" calcext:value-type="float">
            <text:p>1</text:p>
          </table:table-cell>
        </table:table-row>
        <table:table-row table:style-name="ro1">
          <table:table-cell office:value-type="string" calcext:value-type="string">
            <text:p>Endzustand [INI]</text:p>
          </table:table-cell>
          <table:table-cell office:value-type="float" office:value="2" calcext:value-type="float">
            <text:p>2</text:p>
          </table:table-cell>
          <table:table-cell table:number-columns-repeated="3"/>
        </table:table-row>
        <table:table-row table:style-name="ro1">
          <table:table-cell office:value-type="string" calcext:value-type="string">
            <text:p>Iterationen</text:p>
          </table:table-cell>
          <table:table-cell office:value-type="float" office:value="1" calcext:value-type="float">
            <text:p>1</text:p>
          </table:table-cell>
          <table:table-cell table:number-columns-repeated="3"/>
        </table:table-row>
        <table:table-row table:style-name="ro1">
          <table:table-cell office:value-type="string" calcext:value-type="string">
            <text:p>Grad</text:p>
          </table:table-cell>
          <table:table-cell office:value-type="float" office:value="1" calcext:value-type="float">
            <text:p>1</text:p>
          </table:table-cell>
          <table:table-cell table:number-columns-repeated="3"/>
        </table:table-row>
        <table:table-row table:style-name="ro1">
          <table:table-cell office:value-type="string" calcext:value-type="string">
            <text:p>Anfangszustand [INI]</text:p>
          </table:table-cell>
          <table:table-cell office:value-type="float" office:value="4" calcext:value-type="float">
            <text:p>4</text:p>
          </table:table-cell>
          <table:table-cell table:number-columns-repeated="3"/>
        </table:table-row>
        <table:table-row table:style-name="ro1">
          <table:table-cell table:number-columns-repeated="5"/>
        </table:table-row>
        <table:table-row table:style-name="ro1">
          <table:table-cell table:style-name="ce2" office:value-type="string" calcext:value-type="string">
            <text:p>in diesem Augenblick</text:p>
          </table:table-cell>
          <table:table-cell table:number-columns-repeated="4"/>
        </table:table-row>
        <table:table-row table:style-name="ro1">
          <table:table-cell office:value-type="string" calcext:value-type="string">
            <text:p>Art und Weise</text:p>
          </table:table-cell>
          <table:table-cell office:value-type="float" office:value="10" calcext:value-type="float">
            <text:p>10</text:p>
          </table:table-cell>
          <table:table-cell/>
          <table:table-cell office:value-type="string" calcext:value-type="string">
            <text:p>Verändertes, Endzustand, Art und Weise</text:p>
          </table:table-cell>
          <table:table-cell office:value-type="float" office:value="3" calcext:value-type="float">
            <text:p>3</text:p>
          </table:table-cell>
        </table:table-row>
        <table:table-row table:style-name="ro1">
          <table:table-cell office:value-type="string" calcext:value-type="string">
            <text:p>Verändertes</text:p>
          </table:table-cell>
          <table:table-cell office:value-type="float" office:value="9" calcext:value-type="float">
            <text:p>9</text:p>
          </table:table-cell>
          <table:table-cell/>
          <table:table-cell office:value-type="string" calcext:value-type="string">
            <text:p>Verändertes, Anfangszustand, Art und Weise</text:p>
          </table:table-cell>
          <table:table-cell office:value-type="float" office:value="1" calcext:value-type="float">
            <text:p>1</text:p>
          </table:table-cell>
        </table:table-row>
        <table:table-row table:style-name="ro1">
          <table:table-cell office:value-type="string" calcext:value-type="string">
            <text:p>Verändertes [INI]</text:p>
          </table:table-cell>
          <table:table-cell office:value-type="float" office:value="1" calcext:value-type="float">
            <text:p>1</text:p>
          </table:table-cell>
          <table:table-cell/>
          <table:table-cell office:value-type="string" calcext:value-type="string">
            <text:p>Verändertes, Art und Weise</text:p>
          </table:table-cell>
          <table:table-cell office:value-type="float" office:value="2" calcext:value-type="float">
            <text:p>2</text:p>
          </table:table-cell>
        </table:table-row>
        <table:table-row table:style-name="ro1">
          <table:table-cell office:value-type="string" calcext:value-type="string">
            <text:p>Endzustand</text:p>
          </table:table-cell>
          <table:table-cell office:value-type="float" office:value="3" calcext:value-type="float">
            <text:p>3</text:p>
          </table:table-cell>
          <table:table-cell/>
          <table:table-cell office:value-type="string" calcext:value-type="string">
            <text:p>Verändertes, Zwischenwert, Art und Weise</text:p>
          </table:table-cell>
          <table:table-cell office:value-type="float" office:value="4" calcext:value-type="float">
            <text:p>4</text:p>
          </table:table-cell>
        </table:table-row>
        <table:table-row table:style-name="ro1">
          <table:table-cell office:value-type="string" calcext:value-type="string">
            <text:p>Endzustand [INI]</text:p>
          </table:table-cell>
          <table:table-cell office:value-type="float" office:value="2" calcext:value-type="float">
            <text:p>2</text:p>
          </table:table-cell>
          <table:table-cell table:number-columns-repeated="3"/>
        </table:table-row>
        <table:table-row table:style-name="ro1">
          <table:table-cell office:value-type="string" calcext:value-type="string">
            <text:p>Anfangszustand</text:p>
          </table:table-cell>
          <table:table-cell office:value-type="float" office:value="1" calcext:value-type="float">
            <text:p>1</text:p>
          </table:table-cell>
          <table:table-cell table:number-columns-repeated="3"/>
        </table:table-row>
        <table:table-row table:style-name="ro1">
          <table:table-cell office:value-type="string" calcext:value-type="string">
            <text:p>Anfangszustand [INI]</text:p>
          </table:table-cell>
          <table:table-cell office:value-type="float" office:value="2" calcext:value-type="float">
            <text:p>2</text:p>
          </table:table-cell>
          <table:table-cell table:number-columns-repeated="3"/>
        </table:table-row>
        <table:table-row table:style-name="ro1">
          <table:table-cell office:value-type="string" calcext:value-type="string">
            <text:p>Zwischenwert</text:p>
          </table:table-cell>
          <table:table-cell office:value-type="float" office:value="4" calcext:value-type="float">
            <text:p>4</text:p>
          </table:table-cell>
          <table:table-cell table:number-columns-repeated="3"/>
        </table:table-row>
      </table:table>
      <table:table table:name="gesamt" table:style-name="ta1">
        <table:table-column table:style-name="co4" table:default-cell-style-name="Default"/>
        <table:table-column table:style-name="co2" table:default-cell-style-name="Default"/>
        <table:table-column table:style-name="co2" table:default-cell-style-name="ce3"/>
        <table:table-row table:style-name="ro1">
          <table:table-cell office:value-type="string" calcext:value-type="string">
            <text:p>Art und Weise</text:p>
          </table:table-cell>
          <table:table-cell office:value-type="float" office:value="63" calcext:value-type="float">
            <text:p>63</text:p>
          </table:table-cell>
          <table:table-cell table:formula="of:=([.B1]/63)*100" office:value-type="float" office:value="100" calcext:value-type="float">
            <text:p>100,0</text:p>
          </table:table-cell>
        </table:table-row>
        <table:table-row table:style-name="ro1">
          <table:table-cell office:value-type="string" calcext:value-type="string">
            <text:p>Verändertes</text:p>
          </table:table-cell>
          <table:table-cell table:formula="of:=[$Tabelle1.B3]+[$Tabelle1.B15]+[$Tabelle1.B28]+[$Tabelle1.B38]+[$Tabelle1.B46]+[$Tabelle1.B59]+[$Tabelle1.B68]" office:value-type="float" office:value="52" calcext:value-type="float">
            <text:p>52</text:p>
          </table:table-cell>
          <table:table-cell table:formula="of:=([.B2]/63)*100" office:value-type="float" office:value="82.5396825396825" calcext:value-type="float">
            <text:p>82,5</text:p>
          </table:table-cell>
        </table:table-row>
        <table:table-row table:style-name="ro1">
          <table:table-cell office:value-type="string" calcext:value-type="string">
            <text:p>Verändertes [INI]</text:p>
          </table:table-cell>
          <table:table-cell table:formula="of:=[$Tabelle1.B4]+[$Tabelle1.B16]+[$Tabelle1.B29]+[$Tabelle1.B39]+[$Tabelle1.B69]+[$Tabelle1.B47]" office:value-type="float" office:value="11" calcext:value-type="float">
            <text:p>11</text:p>
          </table:table-cell>
          <table:table-cell table:formula="of:=([.B3]/63)*100" office:value-type="float" office:value="17.4603174603175" calcext:value-type="float">
            <text:p>17,5</text:p>
          </table:table-cell>
        </table:table-row>
        <table:table-row table:style-name="ro1">
          <table:table-cell office:value-type="string" calcext:value-type="string">
            <text:p>Anfangszustand</text:p>
          </table:table-cell>
          <table:table-cell table:formula="of:=[$Tabelle1.B7]+[$Tabelle1.B17]+[$Tabelle1.B52]+[$Tabelle1.B72]" office:value-type="float" office:value="8" calcext:value-type="float">
            <text:p>8</text:p>
          </table:table-cell>
          <table:table-cell table:formula="of:=([.B4]/63)*100" office:value-type="float" office:value="12.6984126984127" calcext:value-type="float">
            <text:p>12,7</text:p>
          </table:table-cell>
        </table:table-row>
        <table:table-row table:style-name="ro1">
          <table:table-cell office:value-type="string" calcext:value-type="string">
            <text:p>Anfangszustand [INI]</text:p>
          </table:table-cell>
          <table:table-cell table:formula="of:=[$Tabelle1.B8]+[$Tabelle1.B18]+[$Tabelle1.B53]+[$Tabelle1.B64]+[$Tabelle1.B73]" office:value-type="float" office:value="9" calcext:value-type="float">
            <text:p>9</text:p>
          </table:table-cell>
          <table:table-cell table:formula="of:=([.B5]/63)*100" office:value-type="float" office:value="14.2857142857143" calcext:value-type="float">
            <text:p>14,3</text:p>
          </table:table-cell>
        </table:table-row>
        <table:table-row table:style-name="ro1">
          <table:table-cell office:value-type="string" calcext:value-type="string">
            <text:p>Endzustand</text:p>
          </table:table-cell>
          <table:table-cell table:formula="of:=[$Tabelle1.B5]+[$Tabelle1.B19]+[$Tabelle1.B30]+[$Tabelle1.B40]+[$Tabelle1.B48]+[$Tabelle1.B60]+[$Tabelle1.B70]" office:value-type="float" office:value="35" calcext:value-type="float">
            <text:p>35</text:p>
          </table:table-cell>
          <table:table-cell table:formula="of:=([.B6]/63)*100" office:value-type="float" office:value="55.5555555555556" calcext:value-type="float">
            <text:p>55,6</text:p>
          </table:table-cell>
        </table:table-row>
        <table:table-row table:style-name="ro1">
          <table:table-cell office:value-type="string" calcext:value-type="string">
            <text:p>Endzustand [INI]</text:p>
          </table:table-cell>
          <table:table-cell table:formula="of:=[$Tabelle1.B6]+[$Tabelle1.B20]+[$Tabelle1.B31]+[$Tabelle1.B41]+[$Tabelle1.B49]+[$Tabelle1.B61]+[$Tabelle1.B71]" office:value-type="float" office:value="13" calcext:value-type="float">
            <text:p>13</text:p>
          </table:table-cell>
          <table:table-cell table:formula="of:=([.B7]/63)*100" office:value-type="float" office:value="20.6349206349206" calcext:value-type="float">
            <text:p>20,6</text:p>
          </table:table-cell>
        </table:table-row>
        <table:table-row table:style-name="ro1">
          <table:table-cell office:value-type="string" calcext:value-type="string">
            <text:p>Grad</text:p>
          </table:table-cell>
          <table:table-cell table:formula="of:=[$Tabelle1.B23]+[$Tabelle1.B32]+[$Tabelle1.B51]+[$Tabelle1.B63]" office:value-type="float" office:value="9" calcext:value-type="float">
            <text:p>9</text:p>
          </table:table-cell>
          <table:table-cell table:formula="of:=([.B8]/63)*100" office:value-type="float" office:value="14.2857142857143" calcext:value-type="float">
            <text:p>14,3</text:p>
          </table:table-cell>
        </table:table-row>
        <table:table-row table:style-name="ro1">
          <table:table-cell office:value-type="string" calcext:value-type="string">
            <text:p>Ort</text:p>
          </table:table-cell>
          <table:table-cell table:formula="of:=[$Tabelle1.B10]+[$Tabelle1.B33]+[$Tabelle1.B42]" office:value-type="float" office:value="7" calcext:value-type="float">
            <text:p>7</text:p>
          </table:table-cell>
          <table:table-cell table:formula="of:=([.B9]/63)*100" office:value-type="float" office:value="11.1111111111111" calcext:value-type="float">
            <text:p>11,1</text:p>
          </table:table-cell>
        </table:table-row>
        <table:table-row table:style-name="ro1">
          <table:table-cell office:value-type="string" calcext:value-type="string">
            <text:p>Zwischenwert</text:p>
          </table:table-cell>
          <table:table-cell table:formula="of:=[$Tabelle1.B22]+[$Tabelle1.B74]" office:value-type="float" office:value="5" calcext:value-type="float">
            <text:p>5</text:p>
          </table:table-cell>
          <table:table-cell table:formula="of:=([.B10]/63)*100" office:value-type="float" office:value="7.93650793650794" calcext:value-type="float">
            <text:p>7,9</text:p>
          </table:table-cell>
        </table:table-row>
        <table:table-row table:style-name="ro1">
          <table:table-cell office:value-type="string" calcext:value-type="string">
            <text:p>Iterationen</text:p>
          </table:table-cell>
          <table:table-cell table:formula="of:=[$Tabelle1.B21]+[$Tabelle1.B34]+[$Tabelle1.B54]+[$Tabelle1.B62]" office:value-type="float" office:value="5" calcext:value-type="float">
            <text:p>5</text:p>
          </table:table-cell>
          <table:table-cell table:formula="of:=([.B11]/63)*100" office:value-type="float" office:value="7.93650793650794" calcext:value-type="float">
            <text:p>7,9</text:p>
          </table:table-cell>
        </table:table-row>
        <table:table-row table:style-name="ro1">
          <table:table-cell office:value-type="string" calcext:value-type="string">
            <text:p>Attribut</text:p>
          </table:table-cell>
          <table:table-cell table:formula="of:=[$Tabelle1.B24]+[$Tabelle1.B50]" office:value-type="float" office:value="2" calcext:value-type="float">
            <text:p>2</text:p>
          </table:table-cell>
          <table:table-cell table:formula="of:=([.B12]/63)*100" office:value-type="float" office:value="3.17460317460317" calcext:value-type="float">
            <text:p>3,2</text:p>
          </table:table-cell>
        </table:table-row>
        <table:table-row table:style-name="ro1">
          <table:table-cell office:value-type="string" calcext:value-type="string">
            <text:p>Ursache</text:p>
          </table:table-cell>
          <table:table-cell table:formula="of:=[$Tabelle1.B9]" office:value-type="float" office:value="1" calcext:value-type="float">
            <text:p>1</text:p>
          </table:table-cell>
          <table:table-cell table:formula="of:=([.B13]/63)*100" office:value-type="float" office:value="1.58730158730159" calcext:value-type="float">
            <text:p>1,6</text:p>
          </table:table-cell>
        </table:table-row>
        <table:table-row table:style-name="ro1">
          <table:table-cell office:value-type="string" calcext:value-type="string">
            <text:p>Zeit</text:p>
          </table:table-cell>
          <table:table-cell table:formula="of:=[$Tabelle1.B11]" office:value-type="float" office:value="1" calcext:value-type="float">
            <text:p>1</text:p>
          </table:table-cell>
          <table:table-cell table:formula="of:=([.B14]/63)*100" office:value-type="float" office:value="1.58730158730159" calcext:value-type="float">
            <text:p>1,6</text:p>
          </table:table-cell>
        </table:table-row>
        <table:table-row table:style-name="ro1">
          <table:table-cell office:value-type="string" calcext:value-type="string">
            <text:p>Gewissheit</text:p>
          </table:table-cell>
          <table:table-cell office:value-type="float" office:value="1" calcext:value-type="float">
            <text:p>1</text:p>
          </table:table-cell>
          <table:table-cell table:formula="of:=([.B15]/63)*100" office:value-type="float" office:value="1.58730158730159" calcext:value-type="float">
            <text:p>1,6</text:p>
          </table:table-cell>
        </table:table-row>
      </table:table>
      <table:table table:name="Füllwerte_Verändertes" table:style-name="ta1">
        <table:table-column table:style-name="co5" table:default-cell-style-name="ce2"/>
        <table:table-column table:style-name="co2" table:number-columns-repeated="39" table:default-cell-style-name="Default"/>
        <table:table-row table:style-name="ro1">
          <table:table-cell table:style-name="Default"/>
          <table:table-cell table:style-name="ce2" office:value-type="string" calcext:value-type="string">
            <text:p>regulär</text:p>
          </table:table-cell>
          <table:table-cell table:style-name="ce2" office:value-type="string" calcext:value-type="string">
            <text:p>nullinstantiiert</text:p>
          </table:table-cell>
          <table:table-cell table:style-name="ce2"/>
          <table:table-cell table:number-columns-repeated="36"/>
        </table:table-row>
        <table:table-row table:style-name="ro1">
          <table:table-cell office:value-type="string" calcext:value-type="string">
            <text:p>Person</text:p>
          </table:table-cell>
          <table:table-cell office:value-type="float" office:value="40" calcext:value-type="float">
            <text:p>40</text:p>
          </table:table-cell>
          <table:table-cell office:value-type="float" office:value="11" calcext:value-type="float">
            <text:p>11</text:p>
          </table:table-cell>
          <table:table-cell table:number-columns-repeated="37"/>
        </table:table-row>
        <table:table-row table:style-name="ro1">
          <table:table-cell office:value-type="string" calcext:value-type="string">
            <text:p>Tier</text:p>
          </table:table-cell>
          <table:table-cell office:value-type="float" office:value="2" calcext:value-type="float">
            <text:p>2</text:p>
          </table:table-cell>
          <table:table-cell table:number-columns-repeated="38"/>
        </table:table-row>
        <table:table-row table:style-name="ro1">
          <table:table-cell office:value-type="string" calcext:value-type="string">
            <text:p>Objekt</text:p>
          </table:table-cell>
          <table:table-cell office:value-type="float" office:value="7" calcext:value-type="float">
            <text:p>7</text:p>
          </table:table-cell>
          <table:table-cell table:number-columns-repeated="38"/>
        </table:table-row>
        <table:table-row table:style-name="ro1">
          <table:table-cell office:value-type="string" calcext:value-type="string">
            <text:p>Situation</text:p>
          </table:table-cell>
          <table:table-cell office:value-type="float" office:value="2" calcext:value-type="float">
            <text:p>2</text:p>
          </table:table-cell>
          <table:table-cell office:value-type="float" office:value="1" calcext:value-type="float">
            <text:p>1</text:p>
          </table:table-cell>
          <table:table-cell table:number-columns-repeated="37"/>
        </table:table-row>
        <table:table-row table:style-name="ro1">
          <table:table-cell table:style-name="Default"/>
          <table:table-cell table:number-columns-repeated="39"/>
        </table:table-row>
        <table:table-row table:style-name="ro1">
          <table:table-cell table:style-name="Default"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row>
        <table:table-row table:style-name="ro1">
          <table:table-cell office:value-type="string" calcext:value-type="string">
            <text:p>Person</text:p>
          </table:table-cell>
          <table:table-cell table:number-columns-repeated="39"/>
        </table:table-row>
        <table:table-row table:style-name="ro1">
          <table:table-cell table:style-name="Default" office:value-type="string" calcext:value-type="string">
            <text:p>Die Zeit verstrich mit vielen Sorgen, bis meine Zweifel wieder erwachten und &lt;Verändertes&gt;mich&lt;/Verändertes&gt; &lt;lexikalische Einheit&gt;plötzlich&lt;/lexikalische Einheit&gt; &lt;Endzustand&gt;Angst&lt;/Endzustand&gt; überkam.</text:p>
          </table:table-cell>
          <table:table-cell office:value-type="string" calcext:value-type="string">
            <text:p>»Mit der Erbpacht ist das so eine Sache …« begann ich, als &lt;Verändertes&gt;mir&lt;/Verändertes&gt; &lt;lexikalische Einheit&gt;plötzlich&lt;/lexikalische Einheit&gt; &lt;Endzustand&gt;zum Bewußtsein kam, daß ich nicht nur zu Mr. Cuningham sprach&lt;/Endzustand&gt;.</text:p>
          </table:table-cell>
          <table:table-cell office:value-type="string" calcext:value-type="string">
            <text:p>&lt;Verändertes&gt;Saul Wells&lt;/Verändertes&gt; war &lt;lexikalische Einheit&gt;plötzlich&lt;/lexikalische Einheit&gt; &lt;Endzustand&gt;nachdenklich&lt;/Endzustand&gt; geworden.</text:p>
          </table:table-cell>
          <table:table-cell office:value-type="string" calcext:value-type="string">
            <text:p>&lt;Zeit&gt;Nun&lt;/Zeit&gt; ging &lt;Verändertes&gt;mir&lt;/Verändertes&gt; &lt;lexikalische Einheit&gt;plötzlich&lt;/lexikalische Einheit&gt; auf, &lt;Endzustand&gt;daß die Bücher nicht selten von anderen Büchern sprechen&lt;/Endzustand&gt;</text:p>
          </table:table-cell>
          <table:table-cell office:value-type="string" calcext:value-type="string">
            <text:p>&lt;lexikalische Einheit&gt;plötzlich&lt;/lexikalische Einheit&gt; überkam &lt;Verändertes&gt;sie&lt;/Verändertes&gt; &lt;Endzustand&gt;ein Sehnen, das sie beängstigte.&lt;/Endzustand&gt;</text:p>
          </table:table-cell>
          <table:table-cell office:value-type="string" calcext:value-type="string">
            <text:p>&lt;lexikalische Einheit&gt;plötzlich&lt;/lexikalische Einheit&gt; wurde &lt;Verändertes&gt;Anawak&lt;/Verändertes&gt; &lt;Endzustand&gt;klar, was das Ding tat&lt;/Endzustand&gt;</text:p>
          </table:table-cell>
          <table:table-cell office:value-type="string" calcext:value-type="string">
            <text:p>&lt;lexikalische Einheit&gt;Da&lt;/lexikalische Einheit&gt; überfiel &lt;Verändertes&gt;sie&lt;/Verändertes&gt; &lt;Endzustand&gt;das Gesicht Joaquíns in der Nacht seines Abschieds&lt;/Endzustand&gt; &lt;Art_und_Weise&gt;mit grausamer Klarheit&lt;/Art_und_Weise&gt;</text:p>
          </table:table-cell>
          <table:table-cell office:value-type="string" calcext:value-type="string">
            <text:p>&lt;lexikalische Einheit&gt;da&lt;/lexikalische Einheit&gt; kricht &lt;Verändertes&gt;Jimmi&lt;/Verändertes&gt; &lt;Iterationen&gt;schon wieder&lt;/Iterationen&gt; &lt;Endzustand&gt;sein Kribbel&lt;/Endzustand&gt;</text:p>
          </table:table-cell>
          <table:table-cell office:value-type="string" calcext:value-type="string">
            <text:p>&lt;lexikalische Einheit&gt;Da&lt;/lexikalische Einheit&gt; hörte &lt;Anfangszustand&gt;der Spaß&lt;/Anfangszustand&gt; für &lt;Verändertes&gt;sie&lt;/Verändertes&gt; auf:</text:p>
          </table:table-cell>
          <table:table-cell office:value-type="string" calcext:value-type="string">
            <text:p>&lt;lexikalische Einheit&gt;da&lt;/lexikalische Einheit&gt; durchfuhr es &lt;Verändertes&gt;mich&lt;/Verändertes&gt; &lt;Art_und_Weise&gt;wie ein Blitz mit grauenhafter Beklemmung&lt;/Art_und_Weise&gt; [FE:Endzustand INI]</text:p>
          </table:table-cell>
          <table:table-cell office:value-type="string" calcext:value-type="string">
            <text:p>&lt;lexikalische Einheit&gt;Da&lt;/lexikalische Einheit&gt; wurde &lt;Verändertes&gt;sie&lt;/Verändertes&gt; &lt;Grad&gt;sehr&lt;/Grad&gt; &lt;Endzustand&gt;lebhaft&lt;/Endzustand&gt;</text:p>
          </table:table-cell>
          <table:table-cell office:value-type="string" calcext:value-type="string">
            <text:p>&lt;lexikalische Einheit&gt;Da&lt;/lexikalische Einheit&gt; verlor &lt;Verändertes&gt;Hanna&lt;Verändertes&gt; &lt;Anfangszustand&gt;die Beherrschung&lt;/Anfangszustand&gt;</text:p>
          </table:table-cell>
          <table:table-cell office:value-type="string" calcext:value-type="string">
            <text:p>&lt;Verändertes&gt;Nancy&lt;/Verändertes&gt; wurde &lt;lexikalische Einheit&gt;auf einmal&lt;/lexikalische Einheit&gt; &lt;Grad&gt;furchtbar&lt;/Grad&gt; &lt;Endzustand&gt;heiß&lt;/Endzustand&gt;.</text:p>
          </table:table-cell>
          <table:table-cell office:value-type="string" calcext:value-type="string">
            <text:p>&lt;Verändertes&gt;Sie&lt;/Verändertes&gt; fühlte sich &lt;lexikalische Einheit&gt;auf einmal&lt;/lexikalische Einheit&gt; &lt;Grad&gt;viel&lt;/Grad&gt; &lt;Endzustand&gt;besser&lt;/Endzustand&gt;.</text:p>
          </table:table-cell>
          <table:table-cell office:value-type="string" calcext:value-type="string">
            <text:p>Am Abend zuvor, als er erfahren hatte, daß man Yngve Leonard Holm ermordet aufgefunden hatte und daß es möglicherweise einen Zusammenhang zwischen ihm und den Schwestern Eberhardsson oder zumindest ihren Mördern gab, war &lt;Verändertes&gt;er&lt;/Verändertes&gt; &lt;lexikalische Einheit&gt;auf einmal&lt;/lexikalische Einheit&gt; &lt;Endzustand&gt;hellwach&lt;/Endzustand&gt; gewesen</text:p>
          </table:table-cell>
          <table:table-cell office:value-type="string" calcext:value-type="string">
            <text:p>&lt;Verändertes&gt;Piet&lt;/Verändertes&gt; spürte die Zugluft des Kamins an seinen Knöcheln und wurde sich &lt;lexikalische Einheit&gt;auf einmal&lt;/lexikalische Einheit&gt; &lt;Endzustand&gt;der Nacht&lt;/Endzustand&gt; bewußt &lt;Ort&gt;hinter Angelas gekrümmten Schultern&lt;/Ort&gt;</text:p>
          </table:table-cell>
          <table:table-cell office:value-type="string" calcext:value-type="string">
            <text:p>Ein leichtes Schaudern erfaßte mich, &lt;Verändertes&gt;mir&lt;/Verändertes&gt; wurde &lt;lexikalische Einheit&gt;auf einmal&lt;/lexikalische Einheit&gt; &lt;Endzustand&gt;klar, daß diese beiden zu einem tödlichen Zweikampf angetretenen Männer einander gerade wechselseitig bewunderten, als hätte jeder die ganze Zeit nur gehandelt, um sich den Beifall des anderen zu sichern&lt;/Endzustand&gt;.</text:p>
          </table:table-cell>
          <table:table-cell office:value-type="string" calcext:value-type="string">
            <text:p>Erst auf dem Marktplatz überlegte sie sich, was &lt;Verändertes&gt;sie&lt;/Verändertes&gt; für ein Glück gehabt hatte, &lt;Endzustand&gt;den Zehner&lt;/Endzustand&gt; genau &lt;lexikalische Einheit&gt;in dem Moment&lt;/lexikalische Einheit&gt; zu finden, &lt;Zeit&gt;wo sie ihn dringend brauchte&lt;/Zeit&gt;.</text:p>
          </table:table-cell>
          <table:table-cell office:value-type="string" calcext:value-type="string">
            <text:p>&lt;lexikalische Einheit&gt;Genau in dem Moment&lt;/lexikalische Einheit&gt; fuhr &lt;Verändertes&gt;der Mann&lt;/Verändertes&gt; herum. [FE:Endzustand INI]</text:p>
          </table:table-cell>
          <table:table-cell office:value-type="string" calcext:value-type="string">
            <text:p>Und &lt;lexikalische Einheit&gt;in dem Moment&lt;/lexikalische Einheit&gt; entdeckte &lt;Verändertes&gt;er&lt;/Verändertes&gt; &lt;Endzustand&gt;die Scheinwerfer&lt;/Endzustand&gt;, die ein Viereck von zweihundert Metern Seitenlänge bildeten.</text:p>
          </table:table-cell>
          <table:table-cell office:value-type="string" calcext:value-type="string">
            <text:p>Hinter Joseph kam Litvak, den sie als Mike kannte und von dem sie, wie &lt;Verändertes&gt;ihr&lt;/Verändertes&gt; &lt;lexikalische Einheit&gt;in diesem Moment&lt;/lexikalische Einheit&gt; aufging, &lt;Endzustand&gt;immer angenommen hatte, dass er ein ungesundes Wesen habe.&lt;/Endzustand&gt;</text:p>
          </table:table-cell>
          <table:table-cell office:value-type="string" calcext:value-type="string">
            <text:p>Brüder erhob sich und drehte sich zu seinen Männern um, und &lt;lexikalische Einheit&gt;in diesem Moment&lt;/lexikalische Einheit&gt; gewann die &lt;Attribut&gt;Frustration&lt;/Attribut&gt; &lt;Grad&gt;die Überhand&lt;/Grad&gt; in &lt;Verändertes&gt;ihm&lt;/Verändertes&gt;. [FE:Endzustand INI]</text:p>
          </table:table-cell>
          <table:table-cell office:value-type="string" calcext:value-type="string">
            <text:p>&lt;lexikalische Einheit&gt;In diesem Moment&lt;/lexikalische Einheit&gt; wurde &lt;Verändertes&gt;Vayentha&lt;/Verändertes&gt; &lt;Endzustand&gt;klar, dass Langdon ihr niemals glauben würde&lt;/Endzustand&gt;.</text:p>
          </table:table-cell>
          <table:table-cell office:value-type="string" calcext:value-type="string">
            <text:p>&lt;lexikalische Einheit&gt;in diesem Moment&lt;/lexikalische Einheit&gt; stieg der &lt;Endzustand&gt;ganze Ekel vor den Menschen&lt;/Endzustand&gt; &lt;Iterationen&gt;wieder&lt;/Iterationen&gt; in &lt;Verändertes&gt;ihm&lt;/Verändertes&gt; auf</text:p>
          </table:table-cell>
          <table:table-cell office:value-type="string" calcext:value-type="string">
            <text:p>Ja, ich gestehe, &lt;lexikalische Einheit&gt;in diesem Moment&lt;/lexikalische Einheit&gt;erlosch in &lt;Verändertes&gt;mir&lt;/Verändertes&gt; der wache Sinn für die Differenz.</text:p>
          </table:table-cell>
          <table:table-cell office:value-type="string" calcext:value-type="string">
            <text:p>&lt;Gewissheit&gt;Vielleicht&lt;/Gewissheit&gt; setzte &lt;lexikalische Einheit&gt;in diesem Moment&lt;/lexikalische Einheit&gt; &lt;Endzustand&gt;die zornige Gewißheit&lt;/Endzustand&gt; bei &lt;Verändertes&gt;ihr&lt;/Verändertes&gt; ein, daß sie geprellt worden war.</text:p>
          </table:table-cell>
          <table:table-cell office:value-type="string" calcext:value-type="string">
            <text:p>&lt;lexikalische Einheit&gt;in diesem Moment&lt;/lexikalische Einheit&gt; wurde &lt;Verändertes&gt;ihr&lt;/Verändertes&gt; bewußt, &lt;Endzustand&gt;daß sie einander im Lauf der Jahre sehr nahe gekommen waren&lt;/Endzustand&gt;</text:p>
          </table:table-cell>
          <table:table-cell office:value-type="string" calcext:value-type="string">
            <text:p>&lt;lexikalische Einheit&gt;in diesem Moment&lt;/lexikalische Einheit&gt; aber hatte &lt;Verändertes&gt;sie&lt;/Verändertes&gt; &lt;Iterationen&gt;zum ersten Mal&lt;/Iterationen&gt; &lt;Endzustand&gt;richtiggehende Mordgelüste&lt;/Endzustand&gt; verspürt.</text:p>
          </table:table-cell>
          <table:table-cell office:value-type="string" calcext:value-type="string">
            <text:p>&lt;Verändertes&gt;Er&lt;/Verändertes&gt; erwachte &lt;Zeit&gt;später&lt;/Zeit&gt;,&lt;lexikalische Einheit&gt;in dem Augenblick&lt;/lexikalische Einheit&gt;, &lt;Zeit&gt;als Eustacia Lansing das Zimmer betrat&lt;/Zeit&gt;. [FE:Anfangszustand INI; FE:Endzustand INI]</text:p>
          </table:table-cell>
          <table:table-cell office:value-type="string" calcext:value-type="string">
            <text:p>&lt;lexikalische Einheit&gt;Eben in dem Augenblick&lt;/lexikalische Einheit&gt;, &lt;Zeit&gt;in dem die Entrüstung der Öffentlichkeit aufs höchste gestiegen war&lt;/Zeit&gt;, entkam &lt;Verändertes&gt;John Ashley&lt;/Verändertes&gt; seinen Wächtern. [FE:Anfangszustand INI]</text:p>
          </table:table-cell>
          <table:table-cell office:value-type="string" calcext:value-type="string">
            <text:p>&lt;Verändertes&gt;Er&lt;/Verändertes&gt; starb &lt;lexikalische Einheit&gt;in dem Augenblick&lt;/lexikalische Einheit&gt;, &lt;Zeit&gt;den die Lawine brauchte, um die Bäder zu erreichen, durch die offenen Fenster zu schießen und seine Frau zu ersticken, die, bis zuletzt gehorsam, an ihrem Platz im Schwitzraum geblieben war&lt;/Zeit&gt;. [FE:Anfangszustand INI; FE:Endzustand INI]</text:p>
          </table:table-cell>
          <table:table-cell office:value-type="string" calcext:value-type="string">
            <text:p>&lt;lexikalische Einheit&gt;In diesem Augenblick&lt;/lexikalische Einheit&gt; war &lt;Verändertes&gt;ihm&lt;/Verändertes&gt; &lt;Endzustand&gt;etwas geschehen, das er noch nie erlebt hatte&lt;/Endzustand&gt;.</text:p>
          </table:table-cell>
          <table:table-cell office:value-type="string" calcext:value-type="string">
            <text:p>&lt;lexikalische Einheit&gt;In diesem Augenblick&lt;/lexikalische Einheit&gt; fasste &lt;Verändertes&gt;er&lt;/Verändertes&gt; &lt;Endzustand&gt;seinen Entschluss&lt;/Endzustand&gt;.</text:p>
          </table:table-cell>
          <table:table-cell office:value-type="string" calcext:value-type="string">
            <text:p>Denn &lt;lexikalische Einheit&gt;in diesem Augenblick&lt;/lexikalische Einheit&gt; überkam &lt;Verändertes&gt;mich&lt;/Verändertes&gt; &lt;Endzustand&gt;das Orm&lt;/Endzustand&gt;.«</text:p>
          </table:table-cell>
          <table:table-cell office:value-type="string" calcext:value-type="string">
            <text:p>&lt;lexikalische Einheit&gt;In diesem Augenblick&lt;/lexikalische Einheit&gt; machte &lt;Verändertes&gt;Bastian&lt;/Verändertes&gt; &lt;Endzustand&gt;eine schwerwiegende Erfahrung&lt;/Endzustand&gt;</text:p>
          </table:table-cell>
          <table:table-cell office:value-type="string" calcext:value-type="string">
            <text:p>&lt;lexikalische Einheit&gt;in diesem Augenblick&lt;/lexikalische Einheit&gt; begann &lt;Verändertes&gt;ich&lt;/Verändertes&gt; &lt;Zwischenwert&gt;mich innerlich von Jem zu lösen&lt;/Zwischenwert&gt;. [FE:Anfangszustand INI]</text:p>
          </table:table-cell>
          <table:table-cell office:value-type="string" calcext:value-type="string">
            <text:p>&lt;lexikalische Einheit&gt;In diesem Augenblick&lt;/lexikalische Einheit&gt; fing &lt;Verändertes&gt;Bent Rhodes&lt;/Verändertes&gt; an, &lt;Zwischenwert&gt;sich zu wünschen - wirklich ernsthaft zu wünschen-, wieder aus Haven heraus zu sein&lt;/Zwischenwert&gt;. [FE:Endzustand INI]</text:p>
          </table:table-cell>
          <table:table-cell office:value-type="string" calcext:value-type="string">
            <text:p>&lt;lexikalische Einheit&gt;In diesem Augenblick&lt;/lexikalische Einheit&gt; erwachte &lt;Verändertes&gt;er&lt;/Verändertes&gt;. [FE:Anfangszustand INI; FE:Endzustand INI]</text:p>
          </table:table-cell>
          <table:table-cell office:value-type="string" calcext:value-type="string">
            <text:p>&lt;lexikalische Einheit&gt;In diesem Augenblick&lt;/lexikalische Einheit&gt; hatte &lt;Verändertes&gt;er&lt;/Verändertes&gt; &lt;Zwischenwert&gt;angefangen zu begreifen, in einer Deutlichkeit, die sich seither noch gesteigert hatte, wieviel an Leidenschaft und Glanz des Lebens – an gegenseitigem Erforschen, an Erhöhung, Teilen, Geben und Nehmen – er und Beatrice nie erfahren hatten&lt;/Zwischenwert&gt;. <text:s/>[FE:Endzustand INI]</text:p>
          </table:table-cell>
          <table:table-cell office:value-type="string" calcext:value-type="string">
            <text:p>&lt;lexikalische Einheit&gt;In dem Moment&lt;/lexikalische Einheit&gt;, &lt;Zeit&gt;als ich das sagte&lt;/Zeit&gt;, merkte &lt;Verändertes&gt;ich&lt;/Verändertes&gt;, &lt;Endzustand&gt;dass es eine himmelschreiende Lüge war&gt;/Endzustand&gt;.</text:p>
          </table:table-cell>
        </table:table-row>
        <table:table-row table:style-name="ro1">
          <table:table-cell office:value-type="string" calcext:value-type="string">
            <text:p>Person [INI]</text:p>
          </table:table-cell>
          <table:table-cell table:number-columns-repeated="39"/>
        </table:table-row>
        <table:table-row table:style-name="ro1">
          <table:table-cell table:style-name="Default" office:value-type="string" calcext:value-type="string">
            <text:p>Der hakennasige Lehrer blickte an Quirrells Turban vorbei direkt in Harrys Augen und &lt;Ursache&gt;ein scharfer, heißer Schmerz&lt;/Ursache&gt; schoss &lt;lexikalische Einheit&gt;plötzlich&lt;/lexikalische Einheit&gt; durch &lt;Ort&gt;Harrys Narbe&lt;/Ort&gt;. [FE:Endzustand INI; FE:Verändertes INI]</text:p>
          </table:table-cell>
          <table:table-cell office:value-type="string" calcext:value-type="string">
            <text:p>&lt;lexikalische Einheit&gt;Plötzlich&lt;/lexikalische Einheit&gt; trat &lt;Endzustand&gt;Entsetzen&lt;/Endzustand&gt; &lt;Ort&gt;auf Hagrids Gesicht&lt;/Ort&gt;. [FE:Verändertes INI]</text:p>
          </table:table-cell>
          <table:table-cell office:value-type="string" calcext:value-type="string">
            <text:p>Seine schlichte und ernsthafte Art beeindruckte sie, so daß &lt;Anfangszustand&gt;der mit so viel Hingabe so viele Tage gepflegte Zorn&lt;/Anfangszustand&gt; sich &lt;lexikalische Einheit&gt;plötzlich&lt;/lexikalische Einheit&gt; milderte. [FE:Verändertes INI]</text:p>
          </table:table-cell>
          <table:table-cell office:value-type="string" calcext:value-type="string">
            <text:p>&lt;lexikalische Einheit&gt;da&lt;/lexikalische Einheit&gt; wuchs &lt;Attribut&gt;sein Ruhm&lt;/Attribut&gt; [FE:Anfangszustand INI; FE:Endzustand INI; FE:Verändertes INI]</text:p>
          </table:table-cell>
          <table:table-cell office:value-type="string" calcext:value-type="string">
            <text:p>&lt;lexikalische Einheit&gt;Da&lt;/lexikalische Einheit&gt; war es &lt;lexikalische Einheit&gt;plötzlich&lt;/lexikalische Einheit&gt; um &lt;Anfangszustand&gt;ihre Fassung&lt;/Anfangszustand&gt; geschehen. <text:s/>[FE:Verändertes INI]</text:p>
          </table:table-cell>
          <table:table-cell office:value-type="string" calcext:value-type="string">
            <text:p>Penelope, die nie weinte, fühlte, wie ihr &lt;lexikalische Einheit&gt;auf einmal&lt;/lexikalische Einheit&gt; &lt;Endzustand&gt;Tränen&lt;/Endzustand&gt; &lt;Ort&gt;in die Augen&lt;/Ort&gt; stiegen. [FE:Verändertes INI]</text:p>
          </table:table-cell>
          <table:table-cell office:value-type="string" calcext:value-type="string">
            <text:p>&lt;lexikalische Einheit&gt;Auf einmal&lt;/lexikalische Einheit&gt; drehte sich &lt;Grad&gt;alles&lt;/Grad&gt; &lt;Ort&gt;in Sofies Kopf&lt;/Ort&gt;. [FE:Endzustand INI; FE:Verändertes INI]</text:p>
          </table:table-cell>
          <table:table-cell office:value-type="string" calcext:value-type="string">
            <text:p>&lt;lexikalische Einheit&gt;In dem Moment&lt;/lexikalische Einheit&gt;, &lt;Zeit&gt;als er die Zange hob&lt;/Zeit&gt;, wurde es &lt;Ort&gt;um Gauß&lt;/Ort&gt; &lt;Endzustand&gt;dunkel&lt;/Endzustand&gt;. [FE:Verändertes INI]</text:p>
          </table:table-cell>
          <table:table-cell office:value-type="string" calcext:value-type="string">
            <text:p>&lt;lexikalische Einheit&gt;In diesem Augenblick&lt;/lexikalische Einheit&gt; verschwinden &lt;Anfangszustand&gt;all die sexuellen Ängste und Frustrationen meiner Jugend&lt;/Anfangszustand&gt; [FE:Verändertes INI]</text:p>
          </table:table-cell>
          <table:table-cell office:value-type="string" calcext:value-type="string">
            <text:p>&lt;lexikalische Einheit&gt;In diesem Moment&lt;/lexikalische Einheit&gt; schwand &lt;Anfangszustand&gt;sie&lt;/Anfangszustand&gt; &lt;Grad&gt;vollständig&lt;/Grad&gt; [FE:Verändertes INI]</text:p>
          </table:table-cell>
          <table:table-cell office:value-type="string" calcext:value-type="string">
            <text:p>&lt;lexikalische Einheit&gt;In diesem Augenblick&lt;/lexikalische Einheit&gt; verschwinden &lt;Anfangszustand&gt;all die sexuellen Ängste und Frustrationen meiner Jugend&lt;/Anfangszustand&gt; [FE:Verändertes INI]</text:p>
          </table:table-cell>
          <table:table-cell table:number-columns-repeated="29"/>
        </table:table-row>
        <table:table-row table:style-name="ro1">
          <table:table-cell office:value-type="string" calcext:value-type="string">
            <text:p>Tier</text:p>
          </table:table-cell>
          <table:table-cell table:number-columns-repeated="39"/>
        </table:table-row>
        <table:table-row table:style-name="ro1">
          <table:table-cell table:style-name="Default" office:value-type="string" calcext:value-type="string">
            <text:p>&lt;lexikalische Einheit&gt;Da&lt;/lexikalische Einheit&gt; hörte &lt;Verändertes&gt;der Hund&lt;/Verändertes&gt; auf &lt;Anfangszustand&gt;zu bellen&lt;/Anfangszustand&gt;.</text:p>
          </table:table-cell>
          <table:table-cell office:value-type="string" calcext:value-type="string">
            <text:p>Während der wenigen Sekunden der Stille knurrte und zuckte der Hund, doch &lt;lexikalische Einheit&gt;in dem Augenblick&lt;/lexikalische Einheit&gt;, &lt;Zeit&gt;da Hermine zu spielen begann&lt;/Zeit&gt;, fiel &lt;Verändertes&gt;er&lt;/Verändertes&gt; &lt;Iterationen&gt;wieder&lt;/Iterationen&gt; in &lt;Grad&gt;tiefen&lt;/Grad&gt; &lt;Endzustand&gt;Schlaf&lt;/Endzustand&gt;.</text:p>
          </table:table-cell>
          <table:table-cell table:number-columns-repeated="38"/>
        </table:table-row>
        <table:table-row table:style-name="ro1">
          <table:table-cell office:value-type="string" calcext:value-type="string">
            <text:p>Objekt</text:p>
          </table:table-cell>
          <table:table-cell table:number-columns-repeated="39"/>
        </table:table-row>
        <table:table-row table:style-name="ro1">
          <table:table-cell table:style-name="Default" office:value-type="string" calcext:value-type="string">
            <text:p>&lt;lexikalische Einheit&gt;plötzlich&lt;/lexikalische Einheit&gt; trocknete &lt;Verändertes&gt;aller Speichel&lt;/Verändertes&gt; &lt;Ort&gt;in seinem Mund&lt;/Ort&gt;. [FE:Anfangszustand INI]</text:p>
          </table:table-cell>
          <table:table-cell office:value-type="string" calcext:value-type="string">
            <text:p>&lt;lexikalische Einheit&gt;Da&lt;/lexikalische Einheit&gt; wurde &lt;Verändertes&gt;es&lt;/Verändertes&gt; zu &lt;Endzustand&gt;Blut&lt;/Endzustand&gt;</text:p>
          </table:table-cell>
          <table:table-cell office:value-type="string" calcext:value-type="string">
            <text:p>&lt;lexikalische Einheit&gt;Auf einmal&lt;lexikalische Einheit&gt; erzitterte &lt;Verändertes&gt;die Straße&lt;/Verändertes&gt; [FE:Endzustand INI]</text:p>
          </table:table-cell>
          <table:table-cell office:value-type="string" calcext:value-type="string">
            <text:p>Wie zu Tode erschreckte Augen lagen &lt;Verändertes&gt;sie&lt;/Verändertes&gt; für eine Sekunde auf der Oberfläche und erbleichten &lt;lexikalische Einheit&gt;in dem Moment&lt;/lexikalische Einheit&gt;, &lt;Zeit&gt;da der Spatel sie unterrührte und das warme Fett sie umschloss&lt;/Zeit&gt;. [FE:Endzustand INI]</text:p>
          </table:table-cell>
          <table:table-cell office:value-type="string" calcext:value-type="string">
            <text:p>Doch &lt;lexikalische Einheit&gt;gerade in diesem Moment&lt;/lexikalische Einheit&gt; weiteten sich &lt;Verändertes&gt;Aphrodites unverwandt auf Neferet gerichtete Augen&lt;/Verändertes&gt; &lt;Grad&gt;unvorstellbar&lt;/Grad&gt;. [FE:Anfangszustand INI; FE:Endzustand INI]</text:p>
          </table:table-cell>
          <table:table-cell office:value-type="string" calcext:value-type="string">
            <text:p>&lt;Verändertes&gt;der Transformator&lt;/Verändertes&gt; war genau &lt;lexikalische Einheit&gt;in dem Augenblick&lt;/lexikalische Einheit&gt; vernichtet worden, &lt;Zeit&gt;in dem er nach der Schließung der Grenzen von entscheidender Wichtigkeit für sie gewesen wäre&lt;/Zeit&gt;. [FE:Anfangszustand INI]</text:p>
          </table:table-cell>
          <table:table-cell office:value-type="string" calcext:value-type="string">
            <text:p>&lt;lexikalische Einheit&gt;In dem Augenblick&lt;/lexikalische Einheit&gt;, &lt;Zeit&gt;als Murtagh sie aus dem Lager verschleppt hatte&lt;/Zeit&gt;, war &lt;Verändertes&gt;die Welt&lt;/Verändertes&gt; zu &lt;Endzustand&gt;einer Lüge&lt;/Endzustand&gt; geworden</text:p>
          </table:table-cell>
          <table:table-cell table:number-columns-repeated="33"/>
        </table:table-row>
        <table:table-row table:style-name="ro1">
          <table:table-cell office:value-type="string" calcext:value-type="string">
            <text:p>Situation</text:p>
          </table:table-cell>
          <table:table-cell table:number-columns-repeated="39"/>
        </table:table-row>
        <table:table-row table:style-name="ro1">
          <table:table-cell table:style-name="Default" office:value-type="string" calcext:value-type="string">
            <text:p>&lt;Verändertes&gt;Die Stimmung im Raum&lt;/Verändertes&gt; war &lt;lexikalische Einheit&gt;auf einmal&lt;/lexikalische Einheit&gt; &lt;Endzustand&gt;ernst&lt;/Endzustand&gt; geworden.</text:p>
          </table:table-cell>
          <table:table-cell office:value-type="string" calcext:value-type="string">
            <text:p>&lt;Verändertes&gt;Der Krieg&lt;/Verändertes&gt; ist &lt;lexikalische Einheit&gt;auf einmal&lt;/lexikalische Einheit&gt; &lt;Iterationen&gt;wieder&lt;/Iterationen&gt; &lt;Grad&gt;schrecklich&lt;/Grad&gt; &lt;Endzustand&gt;wichtig&lt;/Endzustand&gt; geworden.</text:p>
          </table:table-cell>
          <table:table-cell table:number-columns-repeated="38"/>
        </table:table-row>
        <table:table-row table:style-name="ro1">
          <table:table-cell office:value-type="string" calcext:value-type="string">
            <text:p>Situation [INI]</text:p>
          </table:table-cell>
          <table:table-cell table:number-columns-repeated="39"/>
        </table:table-row>
        <table:table-row table:style-name="ro1">
          <table:table-cell table:style-name="Default" office:value-type="string" calcext:value-type="string">
            <text:p>»Ein &lt;Endzustand&gt;Problem&lt;/Endzustand&gt;, das &lt;lexikalische Einheit&gt;in dem Moment&lt;/lexikalische Einheit&gt; auftauchte, &lt;Zeit&gt;als du in der Arena die giftigen Beeren hervorgeholt hast&lt;/Zeit&gt;.« [FE:Verändertes INI]</text:p>
          </table:table-cell>
          <table:table-cell table:number-columns-repeated="39"/>
        </table:table-row>
      </table:table>
      <table:table table:name="Füllwerte_Anfangszustand" table:style-name="ta1">
        <table:table-column table:style-name="co6" table:default-cell-style-name="Default"/>
        <table:table-column table:style-name="co2" table:default-cell-style-name="Default"/>
        <table:table-column table:style-name="co7" table:default-cell-style-name="Default"/>
        <table:table-column table:style-name="co2" table:number-columns-repeated="5" table:default-cell-style-name="Default"/>
        <table:table-row table:style-name="ro1">
          <table:table-cell office:value-type="string" calcext:value-type="string">
            <text:p>mentaler Zustand</text:p>
          </table:table-cell>
          <table:table-cell office:value-type="float" office:value="7" calcext:value-type="float">
            <text:p>7</text:p>
          </table:table-cell>
          <table:table-cell table:number-columns-repeated="6"/>
        </table:table-row>
        <table:table-row table:style-name="ro1">
          <table:table-cell office:value-type="string" calcext:value-type="string">
            <text:p>mentaler Zustand [INI]</text:p>
          </table:table-cell>
          <table:table-cell office:value-type="float" office:value="1" calcext:value-type="float">
            <text:p>1</text:p>
          </table:table-cell>
          <table:table-cell table:number-columns-repeated="6"/>
        </table:table-row>
        <table:table-row table:style-name="ro1">
          <table:table-cell office:value-type="string" calcext:value-type="string">
            <text:p>physischer Zustand</text:p>
          </table:table-cell>
          <table:table-cell office:value-type="float" office:value="1" calcext:value-type="float">
            <text:p>1</text:p>
          </table:table-cell>
          <table:table-cell table:number-columns-repeated="6"/>
        </table:table-row>
        <table:table-row table:style-name="ro1">
          <table:table-cell office:value-type="string" calcext:value-type="string">
            <text:p>physischer Zustand [INI]</text:p>
          </table:table-cell>
          <table:table-cell office:value-type="float" office:value="8" calcext:value-type="float">
            <text:p>8</text:p>
          </table:table-cell>
          <table:table-cell table:number-columns-repeated="6"/>
        </table:table-row>
        <table:table-row table:style-name="ro1">
          <table:table-cell office:value-type="string" calcext:value-type="string">
            <text:p>sozialer Zustand [INI]</text:p>
          </table:table-cell>
          <table:table-cell office:value-type="float" office:value="1" calcext:value-type="float">
            <text:p>1</text:p>
          </table:table-cell>
          <table:table-cell table:number-columns-repeated="6"/>
        </table:table-row>
        <table:table-row table:style-name="ro1" table:number-rows-repeated="3">
          <table:table-cell table:number-columns-repeated="8"/>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row>
        <table:table-row table:style-name="ro1">
          <table:table-cell table:style-name="ce2" office:value-type="string" calcext:value-type="string">
            <text:p>mentaler Zustand</text:p>
          </table:table-cell>
          <table:table-cell table:number-columns-repeated="7"/>
        </table:table-row>
        <table:table-row table:style-name="ro1">
          <table:table-cell office:value-type="string" calcext:value-type="string">
            <text:p>Seine schlichte und ernsthafte Art beeindruckte sie, so daß &lt;Anfangszustand&gt;der mit so viel Hingabe so viele Tage gepflegte Zorn&lt;/Anfangszustand&gt; sich &lt;lexikalische Einheit&gt;plötzlich&lt;/lexikalische Einheit&gt; milderte. [FE:Verändertes INI]</text:p>
          </table:table-cell>
          <table:table-cell office:value-type="string" calcext:value-type="string">
            <text:p>&lt;lexikalische Einheit&gt;Da&lt;/lexikalische Einheit&gt; hörte &lt;Anfangszustand&gt;der Spaß&lt;/Anfangszustand&gt; für &lt;Verändertes&gt;sie&lt;/Verändertes&gt; auf:</text:p>
          </table:table-cell>
          <table:table-cell office:value-type="string" calcext:value-type="string">
            <text:p>&lt;lexikalische Einheit&gt;Da&lt;/lexikalische Einheit&gt; verlor &lt;Verändertes&gt;Hanna&lt;Verändertes&gt; die &lt;Anfangszustand&gt;Beherrschung&lt;/Anfangszustand&gt;</text:p>
          </table:table-cell>
          <table:table-cell office:value-type="string" calcext:value-type="string">
            <text:p>&lt;lexikalische Einheit&gt;Da&lt;/lexikalische Einheit&gt; war es &lt;lexikalische Einheit&gt;plötzlich&lt;/lexikalische Einheit&gt; um &lt;Anfangszustand&gt;ihre Fassung&lt;/Anfangszustand&gt; geschehen. <text:s/>[FE:Verändertes INI]</text:p>
          </table:table-cell>
          <table:table-cell office:value-type="string" calcext:value-type="string">
            <text:p>&lt;lexikalische Einheit&gt;In diesem Moment&lt;/lexikalische Einheit&gt; schwand &lt;Anfangszustand&gt;sie&lt;/Anfangszustand&gt; &lt;Grad&gt;vollständig&lt;/Grad&gt; [FE:Verändertes INI]</text:p>
          </table:table-cell>
          <table:table-cell office:value-type="string" calcext:value-type="string">
            <text:p>Ja, ich gestehe, &lt;lexikalische Einheit&gt;in diesem Moment&lt;/lexikalische Einheit&gt;erlosch in &lt;Verändertes&gt;mir&lt;/Verändertes&gt; &lt;Anfangszustand&gt;der wache Sinn für die Differenz&lt;Anfangszustand&gt;.</text:p>
          </table:table-cell>
          <table:table-cell office:value-type="string" calcext:value-type="string">
            <text:p>&lt;lexikalische Einheit&gt;In diesem Augenblick&lt;/lexikalische Einheit&gt; verschwinden &lt;Anfangszustand&gt;all die sexuellen Ängste und Frustrationen meiner Jugend&lt;/Anfangszustand&gt; [FE:Verändertes INI]</text:p>
          </table:table-cell>
          <table:table-cell/>
        </table:table-row>
        <table:table-row table:style-name="ro1">
          <table:table-cell table:style-name="ce2" office:value-type="string" calcext:value-type="string">
            <text:p>mentaler Zustand [INI]</text:p>
          </table:table-cell>
          <table:table-cell table:number-columns-repeated="7"/>
        </table:table-row>
        <table:table-row table:style-name="ro1">
          <table:table-cell office:value-type="string" calcext:value-type="string">
            <text:p>&lt;lexikalische Einheit&gt;in diesem Augenblick&lt;/lexikalische Einheit&gt; begann &lt;Verändertes&gt;ich&lt;/Verändertes&gt; &lt;Zwischenwert&gt;mich innerlich von Jem zu lösen&lt;/Zwischenwert&gt;. [FE:Anfangszustand INI]</text:p>
          </table:table-cell>
          <table:table-cell table:number-columns-repeated="7"/>
        </table:table-row>
        <table:table-row table:style-name="ro1">
          <table:table-cell table:style-name="ce2" office:value-type="string" calcext:value-type="string">
            <text:p>physischer Zustand</text:p>
          </table:table-cell>
          <table:table-cell table:number-columns-repeated="7"/>
        </table:table-row>
        <table:table-row table:style-name="ro1">
          <table:table-cell office:value-type="string" calcext:value-type="string">
            <text:p>&lt;lexikalische Einheit&gt;Da&lt;/lexikalische Einheit&gt; hörte &lt;Verändertes&gt;der Hund&lt;/Verändertes&gt; auf &lt;Anfangszustand&gt;zu bellen&lt;/Anfangszustand&gt;.</text:p>
          </table:table-cell>
          <table:table-cell table:number-columns-repeated="7"/>
        </table:table-row>
        <table:table-row table:style-name="ro1">
          <table:table-cell table:style-name="ce2" office:value-type="string" calcext:value-type="string">
            <text:p>physischer Zustand [INI]</text:p>
          </table:table-cell>
          <table:table-cell table:number-columns-repeated="7"/>
        </table:table-row>
        <table:table-row table:style-name="ro1">
          <table:table-cell office:value-type="string" calcext:value-type="string">
            <text:p>&lt;lexikalische Einheit&gt;plötzlich&lt;/lexikalische Einheit&gt; trocknete &lt;Verändertes&gt;aller Speichel&lt;/Verändertes&gt; &lt;Ort&gt;in seinem Mund&lt;/Ort&gt;. [FE:Anfangszustand INI]</text:p>
          </table:table-cell>
          <table:table-cell office:value-type="string" calcext:value-type="string">
            <text:p>Doch &lt;lexikalische Einheit&gt;gerade in diesem Moment&lt;/lexikalische Einheit&gt; weiteten sich &lt;Verändertes&gt;Aphrodites unverwandt auf Neferet gerichtete Augen&lt;/Verändertes&gt; &lt;Grad&gt;unvorstellbar&lt;/Grad&gt;. [FE:Anfangszustand INI; FE:Endzustand INI]</text:p>
          </table:table-cell>
          <table:table-cell office:value-type="string" calcext:value-type="string">
            <text:p>&lt;lexikalische Einheit&gt;Eben in dem Augenblick&lt;/lexikalische Einheit&gt;, &lt;Zeit&gt;in dem die Entrüstung der Öffentlichkeit aufs höchste gestiegen war&lt;/Zeit&gt;, entkam &lt;Verändertes&gt;John Ashley&lt;/Verändertes&gt; seinen Wächtern. [FE:Anfangszustand INI]</text:p>
          </table:table-cell>
          <table:table-cell office:value-type="string" calcext:value-type="string">
            <text:p>&lt;Verändertes&gt;Er&lt;/Verändertes&gt; starb &lt;lexikalische Einheit&gt;in dem Augenblick&lt;/lexikalische Einheit&gt;, &lt;Zeit&gt;den die Lawine brauchte, um die Bäder zu erreichen, durch die offenen Fenster zu schießen und seine Frau zu ersticken, die, bis zuletzt gehorsam, an ihrem Platz im Schwitzraum geblieben war&lt;/Zeit&gt;. [FE:Anfangszustand INI; FE:Endzustand INI]</text:p>
          </table:table-cell>
          <table:table-cell office:value-type="string" calcext:value-type="string">
            <text:p>&lt;lexikalische Einheit&gt;In diesem Augenblick&lt;/lexikalische Einheit&gt; erwachte &lt;Verändertes&gt;Tsukuru&lt;/Verändertes&gt;. [FE:Anfangszustand INI; FE:Endzustand INI]</text:p>
          </table:table-cell>
          <table:table-cell office:value-type="string" calcext:value-type="string">
            <text:p>&lt;lexikalische Einheit&gt;In diesem Augenblick&lt;/lexikalische Einheit&gt; erwachte &lt;Verändertes&gt;er&lt;/Verändertes&gt;. [FE:Anfangszustand INI; FE:Endzustand INI]</text:p>
          </table:table-cell>
          <table:table-cell office:value-type="string" calcext:value-type="string">
            <text:p>&lt;Verändertes&gt;der Transformator&lt;/Verändertes&gt; war genau &lt;lexikalische Einheit&gt;in dem Augenblick&lt;/lexikalische Einheit&gt; vernichtet worden, &lt;Zeit&gt;in dem er nach der Schließung der Grenzen von entscheidender Wichtigkeit für sie gewesen wäre&lt;/Zeit&gt;. [FE:Anfangszustand INI]</text:p>
          </table:table-cell>
          <table:table-cell office:value-type="string" calcext:value-type="string">
            <text:p>&lt;Verändertes&gt;Er&lt;/Verändertes&gt; erwachte &lt;Zeit&gt;später&lt;/Zeit&gt;,&lt;lexikalische Einheit&gt;in dem Augenblick&lt;/lexikalische Einheit&gt;, &lt;Zeit&gt;als Eustacia Lansing das Zimmer betrat&lt;/Zeit&gt;. [FE:Anfangszustand INI; FE:Endzustand INI]</text:p>
          </table:table-cell>
        </table:table-row>
        <table:table-row table:style-name="ro1">
          <table:table-cell table:style-name="ce2" office:value-type="string" calcext:value-type="string">
            <text:p>sozialer Zustand [INI]</text:p>
          </table:table-cell>
          <table:table-cell table:number-columns-repeated="7"/>
        </table:table-row>
        <table:table-row table:style-name="ro1">
          <table:table-cell office:value-type="string" calcext:value-type="string">
            <text:p>&lt;lexikalische Einheit&gt;da&lt;/lexikalische Einheit&gt; wuchs &lt;Attribut&gt;sein Ruhm&lt;/Attribut&gt; [FE:Anfangszustand INI; FE:Endzustand INI; FE:Verändertes INI]</text:p>
          </table:table-cell>
          <table:table-cell table:number-columns-repeated="7"/>
        </table:table-row>
        <table:table-row table:style-name="ro1" table:number-rows-repeated="2">
          <table:table-cell table:number-columns-repeated="8"/>
        </table:table-row>
        <table:table-row table:style-name="ro1">
          <table:table-cell table:style-name="ce2"/>
          <table:table-cell table:number-columns-repeated="7"/>
        </table:table-row>
      </table:table>
      <table:table table:name="Füllwerte_Endzustand" table:style-name="ta1">
        <table:table-column table:style-name="co8" table:default-cell-style-name="ce2"/>
        <table:table-column table:style-name="co2" table:number-columns-repeated="23" table:default-cell-style-name="Default"/>
        <table:table-row table:style-name="ro1">
          <table:table-cell/>
          <table:table-cell table:style-name="ce2" office:value-type="string" calcext:value-type="string">
            <text:p>regulär</text:p>
          </table:table-cell>
          <table:table-cell table:style-name="ce2" office:value-type="string" calcext:value-type="string">
            <text:p>nullinstantiiert</text:p>
          </table:table-cell>
          <table:table-cell table:number-columns-repeated="21"/>
        </table:table-row>
        <table:table-row table:style-name="ro1">
          <table:table-cell office:value-type="string" calcext:value-type="string">
            <text:p>mentaler Zustand</text:p>
          </table:table-cell>
          <table:table-cell office:value-type="float" office:value="24" calcext:value-type="float">
            <text:p>24</text:p>
          </table:table-cell>
          <table:table-cell office:value-type="float" office:value="6" calcext:value-type="float">
            <text:p>6</text:p>
          </table:table-cell>
          <table:table-cell table:number-columns-repeated="21"/>
        </table:table-row>
        <table:table-row table:style-name="ro1">
          <table:table-cell office:value-type="string" calcext:value-type="string">
            <text:p>physischer Zustand</text:p>
          </table:table-cell>
          <table:table-cell office:value-type="float" office:value="10" calcext:value-type="float">
            <text:p>10</text:p>
          </table:table-cell>
          <table:table-cell office:value-type="float" office:value="8" calcext:value-type="float">
            <text:p>8</text:p>
          </table:table-cell>
          <table:table-cell table:number-columns-repeated="21"/>
        </table:table-row>
        <table:table-row table:style-name="ro1">
          <table:table-cell office:value-type="string" calcext:value-type="string">
            <text:p>sozialer Zustand</text:p>
          </table:table-cell>
          <table:table-cell office:value-type="float" office:value="2" calcext:value-type="float">
            <text:p>2</text:p>
          </table:table-cell>
          <table:table-cell office:value-type="float" office:value="1" calcext:value-type="float">
            <text:p>1</text:p>
          </table:table-cell>
          <table:table-cell table:number-columns-repeated="21"/>
        </table:table-row>
        <table:table-row table:style-name="ro1">
          <table:table-cell table:style-name="Default"/>
          <table:table-cell table:number-columns-repeated="23"/>
        </table:table-row>
        <table:table-row table:style-name="ro1">
          <table:table-cell office:value-type="string" calcext:value-type="string">
            <text:p>mentaler Zustand</text:p>
          </table:table-cell>
          <table:table-cell table:number-columns-repeated="23"/>
        </table:table-row>
        <table:table-row table:style-name="ro1">
          <table:table-cell table:style-name="Default" office:value-type="string" calcext:value-type="string">
            <text:p>Die Zeit verstrich mit vielen Sorgen, bis meine Zweifel wieder erwachten und &lt;Verändertes&gt;mich&lt;/Verändertes&gt; &lt;lexikalische Einheit&gt;plötzlich&lt;/lexikalische Einheit&gt; &lt;Endzustand&gt;Angst&lt;/Endzustand&gt; überkam.</text:p>
          </table:table-cell>
          <table:table-cell office:value-type="string" calcext:value-type="string">
            <text:p>»Mit der Erbpacht ist das so eine Sache …« begann ich, als &lt;Verändertes&gt;mir&lt;/Verändertes&gt; &lt;lexikalische Einheit&gt;plötzlich&lt;/lexikalische Einheit&gt; &lt;Endzustand&gt;zum Bewußtsein kam, daß ich nicht nur zu Mr. Cuningham sprach&lt;/Endzustand&gt;.</text:p>
          </table:table-cell>
          <table:table-cell office:value-type="string" calcext:value-type="string">
            <text:p>&lt;Verändertes&gt;Saul Wells&lt;/Verändertes&gt; war &lt;lexikalische Einheit&gt;plötzlich&lt;/lexikalische Einheit&gt; &lt;Endzustand&gt;nachdenklich&lt;/Endzustand&gt; geworden.</text:p>
          </table:table-cell>
          <table:table-cell office:value-type="string" calcext:value-type="string">
            <text:p>&lt;Zeit&gt;Nun&lt;/Zeit&gt; ging &lt;Verändertes&gt;mir&lt;/Verändertes&gt; &lt;lexikalische Einheit&gt;plötzlich&lt;/lexikalische Einheit&gt; auf, &lt;Endzustand&gt;daß die Bücher nicht selten von anderen Büchern sprechen&lt;/Endzustand&gt;</text:p>
          </table:table-cell>
          <table:table-cell office:value-type="string" calcext:value-type="string">
            <text:p>&lt;lexikalische Einheit&gt;plötzlich&lt;/lexikalische Einheit&gt; überkam &lt;Verändertes&gt;sie&lt;/Verändertes&gt; &lt;Endzustand&gt;ein Sehnen, das sie beängstigte.&lt;/Endzustand&gt;</text:p>
          </table:table-cell>
          <table:table-cell office:value-type="string" calcext:value-type="string">
            <text:p>&lt;lexikalische Einheit&gt;Plötzlich&lt;/lexikalische Einheit&gt; trat &lt;Endzustand&gt;Entsetzen&lt;/Endzustand&gt; &lt;Ort&gt;auf Hagrids Gesicht&lt;/Ort&gt;. [FE:Verändertes INI]</text:p>
          </table:table-cell>
          <table:table-cell office:value-type="string" calcext:value-type="string">
            <text:p>&lt;lexikalische Einheit&gt;plötzlich&lt;/lexikalische Einheit&gt; wurde &lt;Verändertes&gt;Anawak&lt;/Verändertes&gt; &lt;Endzustand&gt;klar, was das Ding tat&lt;/Endzustand&gt;</text:p>
          </table:table-cell>
          <table:table-cell office:value-type="string" calcext:value-type="string">
            <text:p>&lt;lexikalische Einheit&gt;Da&lt;/lexikalische Einheit&gt; überfiel &lt;Verändertes&gt;sie&lt;/Verändertes&gt; &lt;Endzustand&gt;das Gesicht Joaquíns in der Nacht seines Abschieds&lt;/Endzustand&gt; &lt;Art_und_Weise&gt;mit grausamer Klarheit&lt;/Art_und_Weise&gt;</text:p>
          </table:table-cell>
          <table:table-cell office:value-type="string" calcext:value-type="string">
            <text:p>&lt;lexikalische Einheit&gt;da&lt;/lexikalische Einheit&gt; kricht &lt;Verändertes&gt;Jimmi&lt;/Verändertes&gt; &lt;Iterationen&gt;schon wieder&lt;/Iterationen&gt; &lt;Endzustand&gt;sein Kribbel&lt;/Endzustand&gt;</text:p>
          </table:table-cell>
          <table:table-cell office:value-type="string" calcext:value-type="string">
            <text:p>Ein leichtes Schaudern erfaßte mich, &lt;Verändertes&gt;mir&lt;/Verändertes&gt; wurde &lt;lexikalische Einheit&gt;auf einmal&lt;/lexikalische Einheit&gt; &lt;Endzustand&gt;klar, daß diese beiden zu einem tödlichen Zweikampf angetretenen Männer einander gerade wechselseitig bewunderten, als hätte jeder die ganze Zeit nur gehandelt, um sich den Beifall des anderen zu sichern&lt;/Endzustand&gt;.</text:p>
          </table:table-cell>
          <table:table-cell office:value-type="string" calcext:value-type="string">
            <text:p>Und &lt;lexikalische Einheit&gt;in dem Moment&lt;/lexikalische Einheit&gt; entdeckte &lt;Verändertes&gt;er&lt;/Verändertes&gt; &lt;Endzustand&gt;die Scheinwerfer&lt;/Endzustand&gt;, die ein Viereck von zweihundert Metern Seitenlänge bildeten.</text:p>
          </table:table-cell>
          <table:table-cell office:value-type="string" calcext:value-type="string">
            <text:p>Erst auf dem Marktplatz überlegte sie sich, was &lt;Verändertes&gt;sie&lt;/Verändertes&gt; für ein Glück gehabt hatte, &lt;Endzustand&gt;den Zehner&lt;/Endzustand&gt; genau &lt;lexikalische Einheit&gt;in dem Moment&lt;/lexikalische Einheit&gt; zu finden, &lt;Zeit&gt;wo sie ihn dringend brauchte&lt;/Zeit&gt;.</text:p>
          </table:table-cell>
          <table:table-cell office:value-type="string" calcext:value-type="string">
            <text:p>&lt;lexikalische Einheit&gt;In dem Moment&lt;/lexikalische Einheit&gt;, &lt;Zeit&gt;als ich das sagte&lt;/Zeit&gt;, merkte &lt;Verändertes&gt;ich&lt;/Verändertes&gt;, &lt;Endzustand&gt;dass es eine himmelschreiende Lüge war&gt;/Endzustand&gt;.</text:p>
          </table:table-cell>
          <table:table-cell office:value-type="string" calcext:value-type="string">
            <text:p>Hinter Joseph kam Litvak, den sie als Mike kannte und von dem sie, wie &lt;Verändertes&gt;ihr&lt;/Verändertes&gt; &lt;lexikalische Einheit&gt;in diesem Moment&lt;/lexikalische Einheit&gt; aufging, &lt;Endzustand&gt;immer angenommen hatte, dass er ein ungesundes Wesen habe.&lt;/Endzustand&gt;</text:p>
          </table:table-cell>
          <table:table-cell office:value-type="string" calcext:value-type="string">
            <text:p>»Ein &lt;Endzustand&gt;Problem&lt;/Endzustand&gt;, das &lt;lexikalische Einheit&gt;in dem Moment auftauchte, als du in der Arena die giftigen Beeren hervorgeholt hast.&lt;/lexikalische Einheit&gt;« [FE:Verändertes INI]</text:p>
          </table:table-cell>
          <table:table-cell office:value-type="string" calcext:value-type="string">
            <text:p>&lt;lexikalische Einheit&gt;In diesem Moment&lt;/lexikalische Einheit&gt; wurde &lt;Verändertes&gt;Vayentha&lt;/Verändertes&gt; &lt;Endzustand&gt;klar, dass Langdon ihr niemals glauben würde&lt;/Endzustand&gt;.</text:p>
          </table:table-cell>
          <table:table-cell office:value-type="string" calcext:value-type="string">
            <text:p>&lt;lexikalische Einheit&gt;in diesem Moment&lt;/lexikalische Einheit&gt; stieg der &lt;Endzustand&gt;ganze Ekel vor den Menschen&lt;/Endzustand&gt; &lt;Iterationen&gt;wieder&lt;/Iterationen&gt; in &lt;Verändertes&gt;ihm&lt;/Verändertes&gt; auf</text:p>
          </table:table-cell>
          <table:table-cell office:value-type="string" calcext:value-type="string">
            <text:p>&lt;Gewissheit&gt;Vielleicht&lt;/Gewissheit&gt; setzte &lt;lexikalische Einheit&gt;in diesem Moment&lt;/lexikalische Einheit&gt; &lt;Endzustand&gt;die zornige Gewißheit&lt;/Endzustand&gt; bei &lt;Verändertes&gt;ihr&lt;/Verändertes&gt; ein, daß sie geprellt worden war.</text:p>
          </table:table-cell>
          <table:table-cell office:value-type="string" calcext:value-type="string">
            <text:p>&lt;lexikalische Einheit&gt;in diesem Moment&lt;/lexikalische Einheit&gt; wurde &lt;Verändertes&gt;ihr&lt;/Verändertes&gt; bewußt, &lt;Endzustand&gt;daß sie einander im Lauf der Jahre sehr nahe gekommen waren&lt;/Endzustand&gt;</text:p>
          </table:table-cell>
          <table:table-cell office:value-type="string" calcext:value-type="string">
            <text:p>&lt;lexikalische Einheit&gt;in diesem Moment&lt;/lexikalische Einheit&gt; aber hatte &lt;Verändertes&gt;sie&lt;/Verändertes&gt; &lt;Iterationen&gt;zum ersten Mal&lt;/Iterationen&gt; &lt;Endzustand&gt;richtiggehende Mordgelüste&lt;/Endzustand&gt; verspürt.</text:p>
          </table:table-cell>
          <table:table-cell office:value-type="string" calcext:value-type="string">
            <text:p>&lt;lexikalische Einheit&gt;In dem Augenblick&lt;/lexikalische Einheit&gt;, &lt;Zeit&gt;als Murtagh sie aus dem Lager verschleppt hatte&lt;/Zeit&gt;, war &lt;Verändertes&gt;die Welt&lt;/Verändertes&gt; zu &lt;Endzustand&gt;einer Lüge&lt;/Endzustand&gt; geworden</text:p>
          </table:table-cell>
          <table:table-cell office:value-type="string" calcext:value-type="string">
            <text:p>&lt;lexikalische Einheit&gt;In diesem Augenblick&lt;/lexikalische Einheit&gt; fasste &lt;Verändertes&gt;er&lt;/Verändertes&gt; &lt;Endzustand&gt;seinen Entschluss&lt;/Endzustand&gt;.</text:p>
          </table:table-cell>
          <table:table-cell office:value-type="string" calcext:value-type="string">
            <text:p>Denn &lt;lexikalische Einheit&gt;in diesem Augenblick&lt;/lexikalische Einheit&gt; überkam &lt;Verändertes&gt;mich&lt;/Verändertes&gt; &lt;Endzustand&gt;das Orm&lt;/Endzustand&gt;.«</text:p>
          </table:table-cell>
          <table:table-cell office:value-type="string" calcext:value-type="string">
            <text:p>&lt;lexikalische Einheit&gt;In diesem Augenblick&lt;/lexikalische Einheit&gt; machte &lt;Verändertes&gt;Bastian&lt;/Verändertes&gt; &lt;Endzustand&gt;eine schwerwiegende Erfahrung&lt;/Endzustand&gt;</text:p>
          </table:table-cell>
        </table:table-row>
        <table:table-row table:style-name="ro1">
          <table:table-cell office:value-type="string" calcext:value-type="string">
            <text:p>mentaler Zustand [INI]</text:p>
          </table:table-cell>
          <table:table-cell table:number-columns-repeated="23"/>
        </table:table-row>
        <table:table-row table:style-name="ro1">
          <table:table-cell table:style-name="Default" office:value-type="string" calcext:value-type="string">
            <text:p>Der hakennasige Lehrer blickte an Quirrells Turban vorbei direkt in Harrys Augen und &lt;Ursache&gt;ein scharfer, heißer Schmerz&lt;/Ursache&gt; schoss &lt;lexikalische Einheit&gt;plötzlich&lt;/lexikalische Einheit&gt; durch &lt;Ort&gt;Harrys Narbe&lt;/Ort&gt;. [FE:Endzustand INI; FE:Verändertes INI]</text:p>
          </table:table-cell>
          <table:table-cell office:value-type="string" calcext:value-type="string">
            <text:p>Brüder erhob sich und drehte sich zu seinen Männern um, und &lt;lexikalische Einheit&gt;in diesem Moment&lt;/lexikalische Einheit&gt; gewann die &lt;Attribut&gt;Frustration&lt;/Attribut&gt; &lt;Grad&gt;die Überhand&lt;/Grad&gt; in &lt;Verändertes&gt;ihm&lt;/Verändertes&gt;. [FE:Endzustand INI]</text:p>
          </table:table-cell>
          <table:table-cell office:value-type="string" calcext:value-type="string">
            <text:p>&lt;lexikalische Einheit&gt;In diesem Augenblick&lt;/lexikalische Einheit&gt; fing &lt;Verändertes&gt;Bent Rhodes&lt;/Verändertes&gt; an, &lt;Zwischenwert&gt;sich zu wünschen - wirklich ernsthaft zu wünschen-, wieder aus Haven heraus zu sein&lt;/Zwischenwert&gt;. [FE:Endzustand INI]</text:p>
          </table:table-cell>
          <table:table-cell office:value-type="string" calcext:value-type="string">
            <text:p>&lt;lexikalische Einheit&gt;In diesem Augenblick&lt;/lexikalische Einheit&gt; hatte &lt;Verändertes&gt;er&lt;/Verändertes&gt; &lt;Zwischenwert&gt;angefangen zu begreifen, in einer Deutlichkeit, die sich seither noch gesteigert hatte, wieviel an Leidenschaft und Glanz des Lebens – an gegenseitigem Erforschen, an Erhöhung, Teilen, Geben und Nehmen – er und Beatrice nie erfahren hatten&lt;/Zwischenwert&gt;. <text:s/>[FE:Endzustand INI]</text:p>
          </table:table-cell>
          <table:table-cell office:value-type="string" calcext:value-type="string">
            <text:p>&lt;lexikalische Einheit&gt;da&lt;/lexikalische Einheit&gt; durchfuhr es &lt;Verändertes&gt;mich&lt;/Verändertes&gt; &lt;Art_und_Weise&gt;wie ein Blitz mit grauenhafter Beklemmung&lt;/Art_und_Weise&gt; [FE:Endzustand INI]</text:p>
          </table:table-cell>
          <table:table-cell office:value-type="string" calcext:value-type="string">
            <text:p>&lt;lexikalische Einheit&gt;Auf einmal&lt;/lexikalische Einheit&gt; drehte sich &lt;Grad&gt;alles&lt;/Grad&gt; &lt;Ort&gt;in Sofies Kopf&lt;/Ort&gt;. [FE:Endzustand INI; FE:Verändertes INI]</text:p>
          </table:table-cell>
          <table:table-cell table:number-columns-repeated="18"/>
        </table:table-row>
        <table:table-row table:style-name="ro1">
          <table:table-cell office:value-type="string" calcext:value-type="string">
            <text:p>physischer Zustand</text:p>
          </table:table-cell>
          <table:table-cell table:number-columns-repeated="23"/>
        </table:table-row>
        <table:table-row table:style-name="ro1">
          <table:table-cell table:style-name="Default" office:value-type="string" calcext:value-type="string">
            <text:p>&lt;lexikalische Einheit&gt;Da&lt;/lexikalische Einheit&gt; wurde &lt;Verändertes&gt;es&lt;/Verändertes&gt; zu &lt;Endzustand&gt;Blut&lt;/Endzustand&gt;</text:p>
          </table:table-cell>
          <table:table-cell office:value-type="string" calcext:value-type="string">
            <text:p>&lt;lexikalische Einheit&gt;Da&lt;/lexikalische Einheit&gt; wurde &lt;Verändertes&gt;sie&lt;/Verändertes&gt; &lt;Grad&gt;sehr&lt;/Grad&gt; &lt;Endzustand&gt;lebhaft&lt;/Endzustand&gt;</text:p>
          </table:table-cell>
          <table:table-cell office:value-type="string" calcext:value-type="string">
            <text:p>&lt;Verändertes&gt;Nancy&lt;/Verändertes&gt; wurde &lt;lexikalische Einheit&gt;auf einmal&lt;/lexikalische Einheit&gt; &lt;Grad&gt;furchtbar&lt;/Grad&gt; &lt;Endzustand&gt;heiß&lt;/Endzustand&gt;.</text:p>
          </table:table-cell>
          <table:table-cell office:value-type="string" calcext:value-type="string">
            <text:p>&lt;Verändertes&gt;Sie&lt;/Verändertes&gt; fühlte sich &lt;lexikalische Einheit&gt;auf einmal&lt;/lexikalische Einheit&gt; &lt;Grad&gt;viel&lt;/Grad&gt; &lt;Endzustand&gt;besser&lt;/Endzustand&gt;.</text:p>
          </table:table-cell>
          <table:table-cell office:value-type="string" calcext:value-type="string">
            <text:p>Penelope, die nie weinte, fühlte, wie ihr &lt;lexikalische Einheit&gt;auf einmal&lt;/lexikalische Einheit&gt; &lt;Endzustand&gt;Tränen&lt;/Endzustand&gt; &lt;Ort&gt;in die Augen&lt;/Ort&gt; stiegen. [FE:Verändertes INI]</text:p>
          </table:table-cell>
          <table:table-cell office:value-type="string" calcext:value-type="string">
            <text:p>Am Abend zuvor, als er erfahren hatte, daß man Yngve Leonard Holm ermordet aufgefunden hatte und daß es möglicherweise einen Zusammenhang zwischen ihm und den Schwestern Eberhardsson oder zumindest ihren Mördern gab, war &lt;Verändertes&gt;er&lt;/Verändertes&gt; &lt;lexikalische Einheit&gt;auf einmal&lt;/lexikalische Einheit&gt; &lt;Endzustand&gt;hellwach&lt;/Endzustand&gt; gewesen</text:p>
          </table:table-cell>
          <table:table-cell office:value-type="string" calcext:value-type="string">
            <text:p>&lt;Verändertes&gt;Piet&lt;/Verändertes&gt; spürte die Zugluft des Kamins an seinen Knöcheln und wurde sich &lt;lexikalische Einheit&gt;auf einmal&lt;/lexikalische Einheit&gt; &lt;Endzustand&gt;der Nacht&lt;/Endzustand&gt; bewußt &lt;Ort&gt;hinter Angelas gekrümmten Schultern&lt;/Ort&gt;</text:p>
          </table:table-cell>
          <table:table-cell office:value-type="string" calcext:value-type="string">
            <text:p>&lt;lexikalische Einheit&gt;In dem Moment&lt;/lexikalische Einheit&gt;, &lt;Zeit&gt;als er die Zange hob&lt;/Zeit&gt;, wurde es &lt;Ort&gt;um Gauß&lt;/Ort&gt; &lt;Endzustand&gt;dunkel&lt;/Endzustand&gt;. [FE:Verändertes INI]</text:p>
          </table:table-cell>
          <table:table-cell office:value-type="string" calcext:value-type="string">
            <text:p>Während der wenigen Sekunden der Stille knurrte und zuckte der Hund, doch &lt;lexikalische Einheit&gt;in dem Augenblick&lt;/lexikalische Einheit&gt;, &lt;Zeit&gt;da Hermine zu spielen begann&lt;/Zeit&gt;, fiel &lt;Verändertes&gt;er&lt;/Verändertes&gt; &lt;Iterationen&gt;wieder&lt;/Iterationen&gt; in &lt;Grad&gt;tiefen&lt;/Grad&gt; &lt;Endzustand&gt;Schlaf&lt;/Endzustand&gt;.</text:p>
          </table:table-cell>
          <table:table-cell office:value-type="string" calcext:value-type="string">
            <text:p>&lt;lexikalische Einheit&gt;In diesem Augenblick&lt;/lexikalische Einheit&gt; war &lt;Verändertes&gt;ihm&lt;/Verändertes&gt; &lt;Endzustand&gt;etwas geschehen, das er noch nie erlebt hatte&lt;/Endzustand&gt;.</text:p>
          </table:table-cell>
          <table:table-cell table:number-columns-repeated="14"/>
        </table:table-row>
        <table:table-row table:style-name="ro1">
          <table:table-cell office:value-type="string" calcext:value-type="string">
            <text:p>physischer Zustand [INI]</text:p>
          </table:table-cell>
          <table:table-cell table:number-columns-repeated="23"/>
        </table:table-row>
        <table:table-row table:style-name="ro1">
          <table:table-cell table:style-name="Default" office:value-type="string" calcext:value-type="string">
            <text:p>&lt;lexikalische Einheit&gt;Auf einmal&lt;lexikalische Einheit&gt; erzitterte &lt;Verändertes&gt;die Straße&lt;/Verändertes&gt; [FE:Endzustand INI]</text:p>
          </table:table-cell>
          <table:table-cell office:value-type="string" calcext:value-type="string">
            <text:p>&lt;lexikalische Einheit&gt;Genau in dem Moment&lt;/lexikalische Einheit&gt; fuhr &lt;Verändertes&gt;der Mann&lt;/Verändertes&gt; herum. [FE:Endzustand INI]</text:p>
          </table:table-cell>
          <table:table-cell office:value-type="string" calcext:value-type="string">
            <text:p>&lt;lexikalische Einheit&gt;In diesem Augenblick&lt;/lexikalische Einheit&gt; erwachte &lt;Verändertes&gt;Tsukuru&lt;/Verändertes&gt;. [FE:Anfangszustand INI; FE:Endzustand INI]</text:p>
          </table:table-cell>
          <table:table-cell office:value-type="string" calcext:value-type="string">
            <text:p>Wie zu Tode erschreckte Augen lagen &lt;Verändertes&gt;sie&lt;/Verändertes&gt; für eine Sekunde auf der Oberfläche und erbleichten &lt;lexikalische Einheit&gt;in dem Moment&lt;/lexikalische Einheit&gt;, &lt;Zeit&gt;da der Spatel sie unterrührte und das warme Fett sie umschloss&lt;/Zeit&gt;. [FE:Endzustand INI]</text:p>
          </table:table-cell>
          <table:table-cell office:value-type="string" calcext:value-type="string">
            <text:p>Doch &lt;lexikalische Einheit&gt;gerade in diesem Moment&lt;/lexikalische Einheit&gt; weiteten sich &lt;Verändertes&gt;Aphrodites unverwandt auf Neferet gerichtete Augen&lt;/Verändertes&gt; &lt;Grad&gt;unvorstellbar&lt;/Grad&gt;. [FE:Anfangszustand INI; FE:Endzustand INI]</text:p>
          </table:table-cell>
          <table:table-cell office:value-type="string" calcext:value-type="string">
            <text:p>&lt;Verändertes&gt;Er&lt;/Verändertes&gt; erwachte &lt;Zeit&gt;später&lt;/Zeit&gt;,&lt;lexikalische Einheit&gt;in dem Augenblick&lt;/lexikalische Einheit&gt;, &lt;Zeit&gt;als Eustacia Lansing das Zimmer betrat&lt;/Zeit&gt;. [FE:Anfangszustand INI; FE:Endzustand INI]</text:p>
          </table:table-cell>
          <table:table-cell office:value-type="string" calcext:value-type="string">
            <text:p>&lt;Verändertes&gt;Er&lt;/Verändertes&gt; starb &lt;lexikalische Einheit&gt;in dem Augenblick&lt;/lexikalische Einheit&gt;, &lt;Zeit&gt;den die Lawine brauchte, um die Bäder zu erreichen, durch die offenen Fenster zu schießen und seine Frau zu ersticken, die, bis zuletzt gehorsam, an ihrem Platz im Schwitzraum geblieben war&lt;/Zeit&gt;. [FE:Anfangszustand INI; FE:Endzustand INI]</text:p>
          </table:table-cell>
          <table:table-cell office:value-type="string" calcext:value-type="string">
            <text:p>&lt;lexikalische Einheit&gt;In diesem Augenblick&lt;/lexikalische Einheit&gt; erwachte &lt;Verändertes&gt;er&lt;/Verändertes&gt;. [FE:Anfangszustand INI; FE:Endzustand INI]</text:p>
          </table:table-cell>
          <table:table-cell table:number-columns-repeated="16"/>
        </table:table-row>
        <table:table-row table:style-name="ro1">
          <table:table-cell office:value-type="string" calcext:value-type="string">
            <text:p>sozialer Zustand</text:p>
          </table:table-cell>
          <table:table-cell table:number-columns-repeated="23"/>
        </table:table-row>
        <table:table-row table:style-name="ro1">
          <table:table-cell table:style-name="Default" office:value-type="string" calcext:value-type="string">
            <text:p>&lt;Verändertes&gt;Die Stimmung im Raum&lt;/Verändertes&gt; war &lt;lexikalische Einheit&gt;auf einmal&lt;/lexikalische Einheit&gt; &lt;Endzustand&gt;ernst&lt;/Endzustand&gt; geworden.</text:p>
          </table:table-cell>
          <table:table-cell office:value-type="string" calcext:value-type="string">
            <text:p>&lt;Verändertes&gt;Der Krieg&lt;/Verändertes&gt; ist &lt;lexikalische Einheit&gt;auf einmal&lt;/lexikalische Einheit&gt; &lt;Iterationen&gt;wieder&lt;/Iterationen&gt; &lt;Grad&gt;schrecklich&lt;/Grad&gt; &lt;Endzustand&gt;wichtig&lt;/Endzustand&gt; geworden.</text:p>
          </table:table-cell>
          <table:table-cell table:number-columns-repeated="22"/>
        </table:table-row>
        <table:table-row table:style-name="ro1">
          <table:table-cell office:value-type="string" calcext:value-type="string">
            <text:p>sozialer Zustand [INI]</text:p>
          </table:table-cell>
          <table:table-cell table:number-columns-repeated="23"/>
        </table:table-row>
        <table:table-row table:style-name="ro1">
          <table:table-cell table:style-name="Default" office:value-type="string" calcext:value-type="string">
            <text:p>&lt;lexikalische Einheit&gt;da&lt;/lexikalische Einheit&gt; wuchs &lt;Attribut&gt;sein Ruhm&lt;/Attribut&gt; [FE:Anfangszustand INI; FE:Endzustand INI; FE:Verändertes INI]</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2">00.00.0000</text:date>, <text:time style:data-style-name="N2" text:time-value="12:52:32.834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0T15:18:33.085000000</meta:creation-date>
    <dc:date>2026-07-12T14:37:36.894000000</dc:date>
    <meta:editing-duration>PT4H14M56S</meta:editing-duration>
    <meta:editing-cycles>12</meta:editing-cycles>
    <meta:generator>LibreOffice/24.2.1.2$Windows_X86_64 LibreOffice_project/db4def46b0453cc22e2d0305797cf981b68ef5ac</meta:generator>
    <meta:document-statistic meta:table-count="5" meta:cell-count="476" meta:object-count="0"/>
    <meta:user-defined meta:name=""/>
  </office:meta>
</office:document-meta>
</file>